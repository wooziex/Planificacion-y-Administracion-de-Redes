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Neue-Light" svg:font-family="HelveticaNeue-Light, 'Helvetica Neue Light', 'Helvetica Neue', Helvetica, Arial, 'Lucida Grand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8.151cm" table:align="left"/>
    </style:style>
    <style:style style:name="Tabla1.A" style:family="table-column">
      <style:table-column-properties style:column-width="8.151cm"/>
    </style:style>
    <style:style style:name="Tabla1.1" style:family="table-row">
      <style:table-row-properties fo:background-color="#fcfdfe">
        <style:background-image/>
      </style:table-row-properties>
    </style:style>
    <style:style style:name="Tabla1.A1" style:family="table-cell">
      <style:table-cell-properties style:vertical-align="middle" fo:background-color="#c3dcf7" fo:padding="0.049cm" fo:border="0.5pt solid #d4e0ee">
        <style:background-image/>
      </style:table-cell-properties>
    </style:style>
    <style:style style:name="Tabla1.A2" style:family="table-cell">
      <style:table-cell-properties style:vertical-align="middle" fo:padding="0.049cm" fo:border="0.5pt solid #d4e0e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17cm"/>
    </style:style>
    <style:style style:name="Tabla2.1" style:family="table-row">
      <style:table-row-properties fo:background-color="#fcfdfe">
        <style:background-image/>
      </style:table-row-properties>
    </style:style>
    <style:style style:name="Tabla2.A1" style:family="table-cell">
      <style:table-cell-properties style:vertical-align="middle" fo:background-color="#c3dcf7" fo:padding="0.049cm" fo:border="0.5pt solid #d4e0ee">
        <style:background-image/>
      </style:table-cell-properties>
    </style:style>
    <style:style style:name="Tabla2.A2" style:family="table-cell">
      <style:table-cell-properties style:vertical-align="middle" fo:padding="0.049cm" fo:border="0.5pt solid #d4e0ee"/>
    </style:style>
    <style:style style:name="Tabla3" style:family="table">
      <style:table-properties style:width="15.436cm" table:align="left"/>
    </style:style>
    <style:style style:name="Tabla3.A" style:family="table-column">
      <style:table-column-properties style:column-width="15.436cm"/>
    </style:style>
    <style:style style:name="Tabla3.A1" style:family="table-cell">
      <style:table-cell-properties style:vertical-align="middle" fo:background-color="#c3dcf7" fo:padding="0.049cm" fo:border="0.5pt solid #d4e0ee">
        <style:background-image/>
      </style:table-cell-properties>
    </style:style>
    <style:style style:name="Tabla4" style:family="table">
      <style:table-properties style:width="17cm" table:align="left"/>
    </style:style>
    <style:style style:name="Tabla4.A" style:family="table-column">
      <style:table-column-properties style:column-width="17cm"/>
    </style:style>
    <style:style style:name="Tabla4.A1" style:family="table-cell">
      <style:table-cell-properties style:vertical-align="middle" fo:padding="0.049cm" fo:border="0.5pt solid #d4e0ee"/>
    </style:style>
    <style:style style:name="P1" style:family="paragraph" style:parent-style-name="Table_20_Heading">
      <style:paragraph-properties fo:margin-left="0cm" fo:margin-right="0cm" fo:margin-top="0cm" fo:margin-bottom="0cm" style:contextual-spacing="false" fo:text-align="center" style:justify-single-word="false" fo:text-indent="0cm" style:auto-text-indent="fals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HelveticaNeue-Light" fo:font-size="12pt" fo:letter-spacing="normal" fo:font-style="normal" fo:font-weight="normal" loext:padding="0cm" loext:border="none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555555" loext:opacity="100%" style:font-name="HelveticaNeue-Light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HelveticaNeue-Light" fo:font-size="12pt" fo:letter-spacing="normal" fo:font-style="normal" fo:font-weight="normal" style:font-name-asian="HelveticaNeue-Light" style:font-size-asian="12pt" style:font-style-asian="normal" style:font-weight-asian="normal" style:font-name-complex="HelveticaNeue-Light" style:font-size-complex="12pt" style:font-style-complex="normal" style:font-weight-complex="normal" loext:padding="0cm" loext:border="none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555555" loext:opacity="100%" style:font-name="HelveticaNeue-Light" fo:font-size="10pt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555555" loext:opacity="100%"/>
    </style:style>
    <style:style style:name="T1" style:family="text">
      <style:text-properties fo:color="#153152" loext:opacity="100%" style:font-name="HelveticaNeue-Light" fo:font-size="18pt" fo:font-weight="bold"/>
    </style:style>
    <style:style style:name="T2" style:family="text">
      <style:text-properties fo:color="#153152" loext:opacity="100%" style:font-name="HelveticaNeue-Light" fo:font-size="18pt" fo:font-weight="bold" style:font-name-asian="HelveticaNeue-Light" style:font-weight-asian="bold" style:font-name-complex="HelveticaNeue-Light" style:font-weight-complex="bold"/>
    </style:style>
    <style:style style:name="T3" style:family="text">
      <style:text-properties fo:color="#555555" loext:opacity="100%" style:font-name="HelveticaNeue-Light"/>
    </style:style>
    <style:style style:name="T4" style:family="text">
      <style:text-properties fo:color="#555555" loext:opacity="100%"/>
    </style:style>
    <style:style style:name="T5" style:family="text">
      <style:text-properties fo:color="#555555" loext:opacity="100%" style:font-name="HelveticaNeue-Light" style:font-name-asian="HelveticaNeue-Light" style:font-name-complex="HelveticaNeue-Light"/>
    </style:style>
    <style:style style:name="T6" style:family="text">
      <style:text-properties fo:color="#153152" loext:opacity="100%" style:font-name="HelveticaNeue-Light" fo:font-size="14pt" fo:font-weight="bold"/>
    </style:style>
    <style:style style:name="T7" style:family="text">
      <style:text-properties fo:color="#153152" loext:opacity="100%" style:font-name="HelveticaNeue-Light" fo:font-size="14pt" fo:font-weight="bold" style:font-name-asian="HelveticaNeue-Light" style:font-weight-asian="bold" style:font-name-complex="HelveticaNeue-Light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id24">
        <text:section text:style-name="Sect1" text:name="ta24_1">
          <table:table table:name="Tabla1" table:style-name="Tabla1">
            <table:table-column table:style-name="Tabla1.A"/>
            <table:table-row table:style-name="Tabla1.1">
              <table:table-cell table:style-name="Tabla1.A1" office:value-type="string">
                <text:p text:style-name="P1"><text:span text:style-name="Strong_20_Emphasis"><text:span text:style-name="T1">CONTEXTO DE LA TAREA</text:span></text:span><text:span text:style-name="T2"/></text:p>
              </table:table-cell>
            </table:table-row>
            <table:table-row table:style-name="Tabla1.1">
              <table:table-cell table:style-name="Tabla1.A2" office:value-type="string">
                <text:p text:style-name="P2"/>
              </table:table-cell>
            </table:table-row>
          </table:table>
          <text:p text:style-name="P3">En esta tarea aprenderemos a administrar cuentas de usuario y grupos en un sistema operativo. </text:p>
          <text:p text:style-name="P3">Estableceremos una configuración de red, configurando debidamente el adaptador o interface de red de una máquina. El servicio encargado de que la red funcione adecuadamente estará funcionando gobernado por el sistema operativo. Activaremos y desactivaremos este servicio.</text:p>
          <text:p text:style-name="P3">Configuraremos el protocolo de red adecuado para que la red esté operativa</text:p>
        </text:section>
      </text:section>
      <text:section text:style-name="Sect1" text:name="id25">
        <text:p text:style-name="P4"/>
        <text:section text:style-name="Sect1" text:name="ta25_1">
          <text:p text:style-name="P5">¿Qué debes hacer?</text:p>
          <table:table table:name="Tabla2" table:style-name="Tabla2">
            <table:table-column table:style-name="Tabla2.A"/>
            <table:table-row table:style-name="Tabla2.1">
              <table:table-cell table:style-name="Tabla2.A1" office:value-type="string">
                <text:p text:style-name="P1"><text:span text:style-name="Strong_20_Emphasis"><text:span text:style-name="T1">ENUNCIADO DE LA TAREA</text:span></text:span><text:span text:style-name="T2"/></text:p>
              </table:table-cell>
            </table:table-row>
            <table:table-row table:style-name="Tabla2.1">
              <table:table-cell table:style-name="Tabla2.A2" office:value-type="string">
                <text:p text:style-name="P6">En esta tarea se trabajará con los sistemas operativos Windows y Linux. Puede usar para ello las máquinas virtuales creadas en la tarea anterior.</text:p>
                <text:p text:style-name="P6">Realice los siguientes apartados:</text:p>
                <text:p text:style-name="P7"><text:span text:style-name="Strong_20_Emphasis"><text:span text:style-name="T3">RA2_a) Se han planificado, creado y configurado cuentas de usuario, grupos, perfiles y políticas de contraseñas locales.</text:span></text:span></text:p>
                <text:p text:style-name="P6"><text:line-break/>En una máquina con Ubuntu desktop vamos a realizar una serie de prácticas en torno a la gestión de usuarios y grupos.</text:p>
                <text:p text:style-name="P6">Desde consola, con comandos, debes de realizar las operaciones que se especifican a continuación.</text:p>
                <text:p text:style-name="P6"><text:line-break/>- Crea dos nuevos usuarios, los nombres de las cuentas de usuario deben cumplir los requisitos especificados en la sección "CRITERIOS DE CORRECCIÓN Y REQUISITOS MÍNIMOS ESPECÍFICOS".</text:p>
                <text:p text:style-name="P6">- Crea un nuevo grupo, el nombre del grupo debe cumplir los requisitos especificados en la sección "CRITERIOS DE CORRECCIÓN Y REQUISITOS MÍNIMOS ESPECÍFICOS".</text:p>
                <text:p text:style-name="P6"><text:line-break/>- Haz pertenecer los dos usuarios creados anteriormente al grupo nuevo.</text:p>
                <text:p text:style-name="P6"><text:line-break/>- Comprueba que los puntos 1, 2 y 3 se han realizado de forma correcta y por tanto los dos usuarios pertenecen al grupo, mostrando el contenido del fichero que tiene la información sobre los grupos existentes en el sistema.</text:p>
                <text:p text:style-name="P6"><text:line-break/>- Inicia sesión con uno de los dos usuarios y cambia la contraseña de dicho usuario, este cambio lo realizará el propio usuario, no el administrador.</text:p>
                <text:p text:style-name="P6"><text:line-break/>- Elimina del grupo a uno de los usuarios, el usuario elegido dejará de pertenecer al grupo, pero la cuenta de usuario no será eliminada del sistema.</text:p>
                <text:p text:style-name="P7"><text:span text:style-name="Strong_20_Emphasis"><text:span text:style-name="T3"><text:line-break/>RA2_c) Se ha actuado sobre los servicios y procesos en función de las necesidades del sistema.</text:span></text:span></text:p>
                <text:p text:style-name="P6">En Ubuntu existe un servicio encargado de gestionar la impresión (el servicio cups).</text:p>
                <text:p text:style-name="P6"><text:line-break/>- Muestra desde consola el estado del servicio de impresión(debe de estar activo).</text:p>
                <text:p text:style-name="P6">- Con el comando adecuado debes detener el servicio de impresión.</text:p>
                <text:p text:style-name="P6">- Vuelve a mostrar el estado del servicio, (ahora debe estar inactivo).</text:p>
                <text:p text:style-name="P6">- Por último activa de nuevo el servicio de impresión, también usando comandos desde la <text:soft-page-break/>consola.</text:p>
                <text:p text:style-name="P6"><text:line-break/>Muestra con capturas estas operaciones que acabas de realizar.</text:p>
                <text:p text:style-name="P7"><text:span text:style-name="Strong_20_Emphasis"><text:span text:style-name="T4"> </text:span></text:span></text:p>
                <text:p text:style-name="P7"><text:span text:style-name="Strong_20_Emphasis"><text:span text:style-name="T3">RA2_d) Se han instalado, configurado y verificado protocolos de red utilizando sistemas operativos libres y propietarios.</text:span></text:span></text:p>
                <text:p text:style-name="P6"><text:line-break/>En una máquina virtual con Windows 10 nos disponemos a configurar el adaptador de red.</text:p>
                <text:p text:style-name="P6"><text:line-break/>- Comprueba y muestra que la máquina virtual tenga la opción “adaptador puente” configurada en el adaptador de red.</text:p>
                <text:p text:style-name="P6"><text:line-break/>- Mostrar con el comando adecuado (desde símbolo de sistema) los datos de red actuales: IP, mascara, gateway, DNS, MAC.</text:p>
                <text:p text:style-name="P6"><text:line-break/>- Cambiar el nombre del adaptador de red del equipo en Windows 10, el adaptador de red se nombrará “NIC-XXX” donde XXX serán las iniciales del alumno, (ver la sección "CRITERIOS DE CORRECCIÓN Y REQUISITOS MÍNIMOS ESPECÍFICOS".</text:p>
                <text:p text:style-name="P6"><text:line-break/>- Configurar la interfaz de red de Windows 10 de forma manual o estática, con las siguientes consideraciones: que la IP sea distinta a la que estaba asignada anteriormente, que la máscara de red y la puerta de enlace sean las mismas de mi red local (mismo rango o segmento de red que el ordenador anfitrión).</text:p>
                <text:p text:style-name="P6"><text:line-break/>- Mostrar con el comando adecuado los datos de red después de los cambios efectuados.<text:span text:style-name="T5"/></text:p>
              </table:table-cell>
            </table:table-row>
          </table:table>
          <text:p text:style-name="P8"/>
        </text:section>
      </text:section>
      <text:section text:style-name="Sect1" text:name="id26">
        <text:p text:style-name="P4"/>
        <text:section text:style-name="Sect1" text:name="ta26_1">
          <text:p text:style-name="P5">¿Qué debes tener en cuenta para resolver la tarea?</text:p>
          <table:table table:name="Tabla3" table:style-name="Tabla3">
            <table:table-column table:style-name="Tabla3.A"/>
            <table:table-row>
              <table:table-cell table:style-name="Tabla3.A1" office:value-type="string">
                <text:p text:style-name="P1"><text:span text:style-name="Strong_20_Emphasis"><text:span text:style-name="T6">CONSEJOS Y RECOMENDACIONES PARA REALIZAR LA TAREA</text:span></text:span><text:span text:style-name="T7"/></text:p>
              </table:table-cell>
            </table:table-row>
          </table:table>
          <table:table table:name="Tabla4" table:style-name="Tabla4">
            <table:table-column table:style-name="Tabla4.A"/>
            <table:table-row>
              <table:table-cell table:style-name="Tabla4.A1" office:value-type="string">
                <text:p text:style-name="P9">Para realizar esta tarea es aconsejable seguir los siguientes pasos:</text:p>
                <text:p text:style-name="P10"> </text:p>
                <text:p text:style-name="P6">Para crear las cuentas de usuario, el grupo y gestionar la pertenencia de los usuarios al grupo, estudie el epígrafe 3.2 Cuentas de usuario local en Linux. Consulte también los ejercicios resueltos “Creación de usuarios en Ubuntu” y “Grupos de usuarios en Ubuntu”.</text:p>
                <text:p text:style-name="P6">Para mostrar la información del grupo creado y eliminar a un usuario del grupo, repase el epígrafe 3.2 Cuentas de usuario local en Linux. Consulte los ejercicios resueltos “Información sobre grupos y usuarios en Ubuntu”.<text:line-break/><text:line-break/>Para la configuración en Windows de una IP estática, puede ser de gran ayuda repasar el epígrafe “9.1. Configuración en sistemas Windows”.<text:span text:style-name="T5"/></text:p>
              </table:table-cell>
            </table:table-row>
          </table:table>
          <text:p text:style-name="P8"/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Neue-Light" svg:font-family="HelveticaNeue-Light, 'Helvetica Neue Light', 'Helvetica Neue', Helvetica, Arial, 'Lucida Grand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5T06:16:53.815182600</meta:creation-date>
    <dc:date>2026-06-15T06:16:59.246040500</dc:date>
    <meta:editing-duration>PT5S</meta:editing-duration>
    <meta:editing-cycles>1</meta:editing-cycles>
    <meta:document-statistic meta:table-count="4" meta:image-count="0" meta:object-count="0" meta:page-count="2" meta:paragraph-count="38" meta:word-count="705" meta:character-count="4363" meta:non-whitespace-character-count="3675"/>
    <meta:generator>LibreOffice/26.2.3.2$Windows_X86_64 LibreOffice_project/70e089b17412e4cb7773e41413306b17a2328c34</meta:generator>
  </office:meta>
</office:document-meta>
</file>