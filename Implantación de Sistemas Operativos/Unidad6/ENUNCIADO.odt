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HelveticaNeue-Light" svg:font-family="HelveticaNeue-Light, 'Helvetica Neue Light', 'Helvetica Neue', Helvetica, Arial, 'Lucida Grand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8.151cm" table:align="left"/>
    </style:style>
    <style:style style:name="Tabla1.A" style:family="table-column">
      <style:table-column-properties style:column-width="8.151cm"/>
    </style:style>
    <style:style style:name="Tabla1.1" style:family="table-row">
      <style:table-row-properties fo:background-color="#fcfdfe">
        <style:background-image/>
      </style:table-row-properties>
    </style:style>
    <style:style style:name="Tabla1.A1" style:family="table-cell">
      <style:table-cell-properties style:vertical-align="middle" fo:background-color="#c3dcf7" fo:padding="0.049cm" fo:border="0.5pt solid #d4e0ee">
        <style:background-image/>
      </style:table-cell-properties>
    </style:style>
    <style:style style:name="Tabla1.A2" style:family="table-cell">
      <style:table-cell-properties style:vertical-align="middle" fo:padding="0.049cm" fo:border="0.5pt solid #d4e0ee"/>
    </style:style>
    <style:style style:name="Tabla2" style:family="table">
      <style:table-properties style:width="15.436cm" table:align="left"/>
    </style:style>
    <style:style style:name="Tabla2.A" style:family="table-column">
      <style:table-column-properties style:column-width="15.436cm"/>
    </style:style>
    <style:style style:name="Tabla2.A1" style:family="table-cell">
      <style:table-cell-properties style:vertical-align="middle" fo:background-color="#c3dcf7" fo:padding="0.049cm" fo:border="0.5pt solid #d4e0ee">
        <style:background-image/>
      </style:table-cell-properties>
    </style:style>
    <style:style style:name="Tabla3" style:family="table">
      <style:table-properties style:width="17cm" table:align="left"/>
    </style:style>
    <style:style style:name="Tabla3.A" style:family="table-column">
      <style:table-column-properties style:column-width="17cm"/>
    </style:style>
    <style:style style:name="Tabla3.A1" style:family="table-cell">
      <style:table-cell-properties style:vertical-align="middle" fo:padding="0.049cm" fo:border="0.5pt solid #d4e0ee"/>
    </style:style>
    <style:style style:name="P1" style:family="paragraph" style:parent-style-name="Text_20_body">
      <style:paragraph-properties fo:margin-top="0cm" fo:margin-bottom="0cm" style:contextual-spacing="false" fo:text-align="center" style:justify-single-word="false"/>
    </style:style>
    <style:style style:name="P2" style:family="paragraph" style:parent-style-name="Table_20_Heading">
      <style:paragraph-properties fo:margin-left="0cm" fo:margin-right="0cm" fo:margin-top="0cm" fo:margin-bottom="0cm" style:contextual-spacing="false" fo:text-align="center" style:justify-single-word="false" fo:text-indent="0cm" style:auto-text-indent="false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HelveticaNeue-Light" fo:font-size="12pt" fo:letter-spacing="normal" fo:font-style="normal" fo:font-weight="normal" loext:padding="0cm" loext:border="none"/>
    </style:style>
    <style:style style:name="P5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fo:letter-spacing="normal" loext:padding="0cm" loext:border="none"/>
    </style:style>
    <style:style style:name="P8" style:family="paragraph" style:parent-style-name="Standard">
      <style:paragraph-properties fo:margin-left="0cm" fo:margin-right="0cm" fo:text-indent="0cm" style:auto-text-indent="false"/>
    </style:style>
    <style:style style:name="P9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</style:style>
    <style:style style:name="P10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fo:color="#555555" loext:opacity="100%" style:font-name="HelveticaNeue-Light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HelveticaNeue-Light" fo:font-size="12pt" fo:letter-spacing="normal" fo:font-style="normal" fo:font-weight="normal" style:font-name-asian="HelveticaNeue-Light" style:font-size-asian="12pt" style:font-style-asian="normal" style:font-weight-asian="normal" style:font-name-complex="HelveticaNeue-Light" style:font-size-complex="12pt" style:font-style-complex="normal" style:font-weight-complex="normal" loext:padding="0cm" loext:border="none"/>
    </style:style>
    <style:style style:name="T1" style:family="text">
      <style:text-properties fo:color="#153152" loext:opacity="100%" style:font-name="HelveticaNeue-Light" fo:font-size="18pt" fo:font-weight="bold"/>
    </style:style>
    <style:style style:name="T2" style:family="text">
      <style:text-properties fo:color="#153152" loext:opacity="100%" style:font-name="HelveticaNeue-Light" fo:font-size="18pt" fo:font-weight="bold" style:font-name-asian="HelveticaNeue-Light" style:font-weight-asian="bold" style:font-name-complex="HelveticaNeue-Light" style:font-weight-complex="bold"/>
    </style:style>
    <style:style style:name="T3" style:family="text">
      <style:text-properties fo:font-variant="normal" fo:text-transform="none" fo:color="#000000" loext:opacity="100%" style:font-name="HelveticaNeue-Light" fo:font-size="12pt" fo:letter-spacing="normal" fo:font-style="normal" fo:font-weight="normal" loext:padding="0cm" loext:border="none"/>
    </style:style>
    <style:style style:name="T4" style:family="text">
      <style:text-properties fo:font-variant="normal" fo:text-transform="none" fo:color="#000000" loext:opacity="100%" fo:letter-spacing="normal" loext:padding="0cm" loext:border="none"/>
    </style:style>
    <style:style style:name="T5" style:family="text">
      <style:text-properties fo:color="#153152" loext:opacity="100%" style:font-name="HelveticaNeue-Light" fo:font-size="14pt" fo:font-weight="bold"/>
    </style:style>
    <style:style style:name="T6" style:family="text">
      <style:text-properties fo:color="#153152" loext:opacity="100%" style:font-name="HelveticaNeue-Light" fo:font-size="14pt" fo:font-weight="bold" style:font-name-asian="HelveticaNeue-Light" style:font-weight-asian="bold" style:font-name-complex="HelveticaNeue-Light" style:font-weight-complex="bold"/>
    </style:style>
    <style:style style:name="T7" style:family="text">
      <style:text-properties fo:color="#555555" loext:opacity="100%" style:font-name="HelveticaNeue-Light"/>
    </style:style>
    <style:style style:name="T8" style:family="text">
      <style:text-properties fo:color="#555555" loext:opacity="100%" style:font-name="HelveticaNeue-Light" style:font-name-asian="HelveticaNeue-Light" style:font-name-complex="HelveticaNeue-Ligh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section text:style-name="Sect1" text:name="id24">
        <text:section text:style-name="Sect1" text:name="ta24_1">
          <text:p text:style-name="P1">Introducción de la tarea</text:p>
          <table:table table:name="Tabla1" table:style-name="Tabla1">
            <table:table-column table:style-name="Tabla1.A"/>
            <table:table-row table:style-name="Tabla1.1">
              <table:table-cell table:style-name="Tabla1.A1" office:value-type="string">
                <text:p text:style-name="P2"><text:span text:style-name="Strong_20_Emphasis"><text:span text:style-name="T1">CONTEXTO DE LA TAREA</text:span></text:span><text:span text:style-name="T2"/></text:p>
              </table:table-cell>
            </table:table-row>
            <table:table-row table:style-name="Tabla1.1">
              <table:table-cell table:style-name="Tabla1.A2" office:value-type="string">
                <text:p text:style-name="P3"/>
              </table:table-cell>
            </table:table-row>
          </table:table>
          <text:p text:style-name="P4">En esta tarea aprenderemos a usar algunas herramientas de monitorización del sistema operativo. Serán herramientas de monitorización en tiempo real, continuada y de recopilación de datos. </text:p>
          <text:p text:style-name="P4">Gracias a estas herramientas el administrador podrá identificar los sucesos que ocurren en el sistema, interpretar los distintos registros de eventos y analizar el sistema en consecuencia de todos estos datos monitorizados.</text:p>
        </text:section>
      </text:section>
      <text:section text:style-name="Sect1" text:name="id25">
        <text:p text:style-name="P5"/>
        <text:section text:style-name="Sect1" text:name="ta25_1">
          <text:p text:style-name="P6"> </text:p>
          <text:p text:style-name="P6"><text:span text:style-name="Strong_20_Emphasis"><text:span text:style-name="T3">Para realizar la tarea se pueden usar las máquinas virtuales con Windows 10 y Windows Server creadas y utilizadas en anteriores tareas.</text:span></text:span></text:p>
          <text:p text:style-name="P6"><text:span text:style-name="Strong_20_Emphasis"><text:span text:style-name="T3">Para el apartado RA06_b, se trabajará en Windows 10 con un usuario </text:span></text:span><text:span text:style-name="T3">XXX_YYYYYYYY</text:span><text:span text:style-name="Strong_20_Emphasis"><text:span text:style-name="T3"> (donde XXX serán las iniciales del alumno y </text:span></text:span><text:span text:style-name="T3">YYYYYYYY</text:span><text:span text:style-name="Strong_20_Emphasis"><text:span text:style-name="T3"> el DNI (tendrá que crear ese usuario para la tarea si no estuviera ya creado en el sistema de anteriores tareas)</text:span></text:span></text:p>
          <text:p text:style-name="P6"><text:span text:style-name="Strong_20_Emphasis"><text:span text:style-name="T4"> </text:span></text:span></text:p>
          <text:p text:style-name="P6"><text:span text:style-name="Strong_20_Emphasis"><text:span text:style-name="T4"> </text:span></text:span></text:p>
          <text:p text:style-name="P6"><text:span text:style-name="Strong_20_Emphasis"><text:span text:style-name="T3">Realice los siguientes pasos para trabajar la tarea:</text:span></text:span></text:p>
          <text:p text:style-name="P7"> </text:p>
          <text:p text:style-name="P6"><text:span text:style-name="Strong_20_Emphasis"><text:span text:style-name="T3">RA06_b) Se han utilizado herramientas de monitorización en tiempo real.</text:span></text:span></text:p>
          <text:p text:style-name="P7"> </text:p>
          <text:p text:style-name="P6"><text:span text:style-name="T3">En una máquina con Windows 10, iniciamos sesión con el usuario </text:span><text:span text:style-name="Strong_20_Emphasis"><text:span text:style-name="T3">XXX_YYYYYYYY</text:span></text:span><text:span text:style-name="T3">.</text:span></text:p>
          <text:p text:style-name="P7"> </text:p>
          <text:p text:style-name="P4">El usuario se dispone a consultar algunos parámetros del sistema en tiempo real, para ello usaremos la herramienta Administrador de tareas, dicha herramienta permitirá observar  los procesos y aplicaciones abiertas en el sistema.</text:p>
          <text:p text:style-name="P7"> </text:p>
          <text:p text:style-name="P6"><text:span text:style-name="T3">Muestre una captura de pantalla de la ficha “Usuarios” del administrador de tareas, donde se pueda apreciar el nombre del usuario (</text:span><text:span text:style-name="Strong_20_Emphasis"><text:span text:style-name="T3">XXX_YYYYYYYY</text:span></text:span><text:span text:style-name="T3">), y el consumo en % de CPU y memoria que está haciendo la propia aplicación “Administrador de tareas” abierta por el usuario.</text:span></text:p>
          <text:p text:style-name="P7"> </text:p>
          <text:p text:style-name="P6"><text:span text:style-name="Strong_20_Emphasis"><text:span text:style-name="T3">RA06_c) Se ha monitorizado el rendimiento mediante registros de contador y de seguimiento del sistema.</text:span></text:span></text:p>
          <text:p text:style-name="P4"><text:line-break/>Este apartado de la tarea se realizará en un sistema operativo Windows Server.<text:line-break/><text:line-break/><text:line-break/>Desde "Símbolo de sistema", genere un evento (de tipo Advertencia, y con identificador 1000) que sea registrado en el registro de eventos de Aplicación. En el evento a crear incluirá un texto descriptivo que ponga exactamente:</text:p>
          <text:p text:style-name="P6"><text:span text:style-name="T4">“</text:span><text:span text:style-name="T3">Evento generado por el alumno </text:span><text:span text:style-name="Strong_20_Emphasis"><text:span text:style-name="T3">XXX_YYYYYYYY</text:span></text:span><text:span text:style-name="T3">" donde "XXX" serán las iniciales del alumno y "YYYYYYYY" el DNI del alumno.</text:span></text:p>
          <text:p text:style-name="P7"><text:soft-page-break/> </text:p>
          <text:p text:style-name="P4">Use para ello el comando Eventcreate.<text:line-break/><text:line-break/>Ejecute la herramienta visor de eventos de Windows Server.<text:line-break/>Desde el visor de eventos de Windows Server, compruebe que se ha registrado el evento generado anteriormente.</text:p>
          <text:p text:style-name="P4">Muestre las capturas necesarias donde se distinga la información sobre ese evento: nombre el registro, fecha y hora del evento, origen, ID del evento, nivel, equipo, y sobre todo el texto descriptivo “Evento generado por el alumno XXX_YYYYYYYY".</text:p>
          <text:p text:style-name="P7"> </text:p>
          <text:p text:style-name="P7"> </text:p>
          <text:p text:style-name="P6"><text:span text:style-name="Strong_20_Emphasis"><text:span text:style-name="T3">Incluir en el informe de la tarea las capturas y comentarios que se crean necesarios para demostrar que se han realizado las acciones solicitadas en los distintos apartados.</text:span></text:span></text:p>
        </text:section>
      </text:section>
      <text:section text:style-name="Sect1" text:name="id26">
        <text:p text:style-name="P8"/>
        <text:section text:style-name="Sect1" text:name="ta26_1">
          <text:p text:style-name="P1">¿Qué debes tener en cuenta para resolver la tarea?</text:p>
          <table:table table:name="Tabla2" table:style-name="Tabla2">
            <table:table-column table:style-name="Tabla2.A"/>
            <table:table-row>
              <table:table-cell table:style-name="Tabla2.A1" office:value-type="string">
                <text:p text:style-name="P2"><text:span text:style-name="Strong_20_Emphasis"><text:span text:style-name="T5">CONSEJOS Y RECOMENDACIONES PARA REALIZAR LA TAREA</text:span></text:span><text:span text:style-name="T6"/></text:p>
              </table:table-cell>
            </table:table-row>
          </table:table>
          <table:table table:name="Tabla3" table:style-name="Tabla3">
            <table:table-column table:style-name="Tabla3.A"/>
            <table:table-row>
              <table:table-cell table:style-name="Tabla3.A1" office:value-type="string">
                <text:p text:style-name="P9"><text:span text:style-name="Strong_20_Emphasis"><text:span text:style-name="T7">Para realizar la tarea se pueden usar las máquinas virtuales con Windows 10 y Windows Server creadas y utilizadas en anteriores tareas.</text:span></text:span></text:p>
                <text:p text:style-name="P9"><text:span text:style-name="Strong_20_Emphasis"><text:span text:style-name="T7">Para los pasos que se requieren en la tarea 6, tenga en cuenta:</text:span></text:span><text:span text:style-name="T7"> </text:span></text:p>
                <text:p text:style-name="P10">Para el apartado RA06_b) le será de gran ayuda consultar el epígrafe 4. Herramientas de monitorización en tiempo real, de la unidad 06.</text:p>
                <text:p text:style-name="P10"><text:line-break/>Para el apartado RA06_c) sería de gran ayuda revisar el epígrafe 5. Herramientas de monitorización continuada, así como el ejercicio resuelto "Uso del comando Eventcreate" de la unidad 06.<text:span text:style-name="T8"/></text:p>
              </table:table-cell>
            </table:table-row>
          </table:table>
          <text:p text:style-name="P11"/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HelveticaNeue-Light" svg:font-family="HelveticaNeue-Light, 'Helvetica Neue Light', 'Helvetica Neue', Helvetica, Arial, 'Lucida Grand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15T06:20:54.019681800</meta:creation-date>
    <dc:date>2026-06-15T06:20:56.123251900</dc:date>
    <meta:editing-duration>PT2S</meta:editing-duration>
    <meta:editing-cycles>1</meta:editing-cycles>
    <meta:document-statistic meta:table-count="3" meta:image-count="0" meta:object-count="0" meta:page-count="2" meta:paragraph-count="34" meta:word-count="522" meta:character-count="3319" meta:non-whitespace-character-count="2801"/>
    <meta:generator>LibreOffice/26.2.3.2$Windows_X86_64 LibreOffice_project/70e089b17412e4cb7773e41413306b17a2328c34</meta:generator>
  </office:meta>
</office:document-meta>
</file>