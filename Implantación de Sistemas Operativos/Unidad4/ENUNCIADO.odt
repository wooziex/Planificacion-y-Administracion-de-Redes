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8.151cm" table:align="left"/>
    </style:style>
    <style:style style:name="Tabla1.A" style:family="table-column">
      <style:table-column-properties style:column-width="8.151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5.436cm" table:align="left"/>
    </style:style>
    <style:style style:name="Tabla2.A" style:family="table-column">
      <style:table-column-properties style:column-width="15.436cm"/>
    </style:style>
    <style:style style:name="Tabla2.A1" style:family="table-cell">
      <style:table-cell-properties style:vertical-align="middle" fo:background-color="#c3dcf7" fo:padding="0.049cm" fo:border="0.5pt solid #d4e0ee">
        <style:background-image/>
      </style:table-cell-properties>
    </style:style>
    <style:style style:name="Tabla3" style:family="table">
      <style:table-properties style:width="17cm" table:align="left"/>
    </style:style>
    <style:style style:name="Tabla3.A" style:family="table-column">
      <style:table-column-properties style:column-width="17cm"/>
    </style:style>
    <style:style style:name="Tabla3.A1"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text-properties fo:font-size="2pt" style:font-size-asian="2pt" style:font-size-complex="2p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loext:padding="0cm" loext:border="none"/>
    </style:style>
    <style:style style:name="P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7"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loext:padding="0cm" loext:border="none"/>
    </style:style>
    <style:style style:name="P8" style:family="paragraph" style:parent-style-name="Text_20_body" style:list-style-name="L2">
      <style:paragraph-properties fo:margin-left="0cm" fo:margin-right="0cm" fo:margin-top="0cm" fo:margin-bottom="0cm" style:contextual-spacing="false" fo:text-align="justify" style:justify-single-word="false" fo:orphans="2" fo:widows="2" fo:text-indent="0cm" style:auto-text-indent="false"/>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fo:letter-spacing="normal" loext:padding="0cm" loext:border="none"/>
    </style:style>
    <style:style style:name="P10"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13" style:family="paragraph" style:parent-style-name="Table_20_Contents">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font-variant="normal" fo:text-transform="none" fo:color="#000000" loext:opacity="100%" style:font-name="HelveticaNeue-Light" fo:font-size="12pt" fo:letter-spacing="normal" fo:font-style="normal" fo:font-weight="normal" loext:padding="0cm" loext:border="none"/>
    </style:style>
    <style:style style:name="T4" style:family="text">
      <style:text-properties fo:color="#153152" loext:opacity="100%" style:font-name="HelveticaNeue-Light" fo:font-size="14pt" fo:font-weight="bold"/>
    </style:style>
    <style:style style:name="T5" style:family="text">
      <style:text-properties fo:color="#153152" loext:opacity="100%" style:font-name="HelveticaNeue-Light" fo:font-size="14pt" fo:font-weight="bold" style:font-name-asian="HelveticaNeue-Light" style:font-weight-asian="bold" style:font-name-complex="HelveticaNeue-Light" style:font-weight-complex="bold"/>
    </style:style>
    <style:style style:name="T6" style:family="text">
      <style:text-properties fo:color="#555555" loext:opacity="100%" style:font-name="HelveticaNeue-Light"/>
    </style:style>
    <style:style style:name="T7" style:family="text">
      <style:text-properties fo:color="#555555" loext:opacity="100%" style:font-name="HelveticaNeue-Light" style:font-name-asian="HelveticaNeue-Light" style:font-name-complex="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
              </table:table-cell>
            </table:table-row>
          </table:table>
          <text:p text:style-name="P4">En esta tarea aprenderemos a implantar un dominio Active Directory con Windows Server 2019. </text:p>
          <text:p text:style-name="P4">Posteriormente deberemos de administrar grupos y cuentas de usuario en el dominio creado. </text:p>
          <text:p text:style-name="P4">Se trata de administrar un dominio en Windows Server, creando objetos y relacionando estos objetos entre sí, de esta forma estaremos aprendiendo a gestionar usuarios de dominio, grupos de dominio y unidades organizativas.</text:p>
        </text:section>
      </text:section>
      <text:section text:style-name="Sect1" text:name="id25">
        <text:p text:style-name="P5"/>
        <text:section text:style-name="Sect1" text:name="ta25_1">
          <text:p text:style-name="P6">En esta tarea deberemos partir de una máquina virtual con Windows Server 2019 instalado.<text:line-break/>Se puede instalar Windows Server sobre una máquina virtual desde cero o se puede usar la máquina virtual con Windows Server 2019 disponible en la sección de recursos generales del módulo de ISO. Os recomiendo que uséis la máquina virtual disponible en el campus, así trabajaremos todos con una máquina bien instalada y optimizada, evitando también perder tiempo en la instalación de la misma.</text:p>
          <text:p text:style-name="P4">No es necesario mostrar nada sobre el proceso de instalación o de descarga de esta máquina en la tarea.</text:p>
          <text:p text:style-name="P6"><text:span text:style-name="Strong_20_Emphasis"><text:span text:style-name="T3">Realice los siguientes pasos previos para trabajar la tarea:</text:span></text:span></text:p>
          <text:p text:style-name="P6"><text:span text:style-name="T3">Configurar el adaptador de red de la máquina virtual con Windows Server en adaptador puente.<text:line-break/></text:span><text:span text:style-name="Strong_20_Emphasis"><text:span text:style-name="T3"> </text:span></text:span><text:span text:style-name="T3"><text:line-break/>Asignar una IP manual o estática al equipo Windows Server, que se encuentre en el rango de direcciones del ordenador anfitrión, por ejemplo, si nuestro equipo anfitrión tiene la dirección IP 192.168.1.4, se podría usar:</text:span></text:p>
          <text:list text:style-name="L1">
            <text:list-item>
              <text:p text:style-name="P7">Dirección IP: 192.168.1.5</text:p>
            </text:list-item>
            <text:list-item>
              <text:p text:style-name="P7">Servidor DNS primario: 127.0.0.1</text:p>
            </text:list-item>
          </text:list>
          <text:p text:style-name="P6"><text:span text:style-name="T3">Cambiar el nombre del equipo servidor a </text:span><text:span text:style-name="Strong_20_Emphasis"><text:span text:style-name="T3">SERVER_XXX</text:span></text:span></text:p>
          <text:p text:style-name="P4">Donde "XXX" serán las iniciales del alumno, ejemplo: para Antonio Moreno Aguilera, el nombre del servidor será "SERVER_AMA".<text:line-break/><text:line-break/>Realice los siguientes apartados:<text:line-break/></text:p>
          <text:p text:style-name="P6"><text:span text:style-name="Strong_20_Emphasis"><text:span text:style-name="T3">RA04_a) Se han implementado dominios.</text:span></text:span></text:p>
          <text:p text:style-name="P4">Ahora deberemos instalar en la máquina Server, los Servicios de directorio Active Directory y promover el servidor:</text:p>
          <text:list text:style-name="L2">
            <text:list-item>
              <text:p text:style-name="P8"><text:span text:style-name="T3">Se deberá crear un dominio llamado </text:span><text:span text:style-name="Strong_20_Emphasis"><text:span text:style-name="T3">XXX.local</text:span></text:span><text:span text:style-name="T3">. </text:span></text:p>
            </text:list-item>
          </text:list>
          <text:p text:style-name="P6"><text:span text:style-name="T3">Donde "XXX" serán las iniciales del alumno, ejemplo: para Antonio Moreno Aguilera, el dominio creado sería "</text:span><text:span text:style-name="Strong_20_Emphasis"><text:span text:style-name="T3">AMA.</text:span></text:span><text:span text:style-name="T3">local".</text:span></text:p>
          <text:p text:style-name="P9"> </text:p>
          <text:p text:style-name="P6"><text:span text:style-name="Strong_20_Emphasis"><text:span text:style-name="T3">RA04_b) Se han administrado cuentas de usuario y cuentas de equipo.</text:span></text:span></text:p>
          <text:p text:style-name="P4">Se deben crear dos cuentas de usuarios del dominio.<text:line-break/>Las cuentas serán:</text:p>
          <text:list text:style-name="L3">
            <text:list-item>
              <text:p text:style-name="P10"><text:span text:style-name="Strong_20_Emphasis"><text:span text:style-name="T3">alumnoXXX</text:span></text:span></text:p>
            </text:list-item>
            <text:list-item>
              <text:p text:style-name="P10"><text:soft-page-break/><text:span text:style-name="Strong_20_Emphasis"><text:span text:style-name="T3">profesorXXX</text:span></text:span></text:p>
            </text:list-item>
          </text:list>
          <text:p text:style-name="P6"><text:span text:style-name="T3">Donde "XXX" serán las iniciales del alumno, ejemplo: para Antonio Moreno Aguilera, los usuarios creados serán "alumno</text:span><text:span text:style-name="Strong_20_Emphasis"><text:span text:style-name="T3">AMA</text:span></text:span><text:span text:style-name="T3">" y "profesor</text:span><text:span text:style-name="Strong_20_Emphasis"><text:span text:style-name="T3">AMA</text:span></text:span><text:span text:style-name="T3">".</text:span></text:p>
          <text:p text:style-name="P6"/>
          <text:p text:style-name="P6"><text:span text:style-name="Strong_20_Emphasis"><text:span text:style-name="T3">RA04_d) Se han creado y administrado grupos de seguridad.</text:span></text:span></text:p>
          <text:p text:style-name="P6"><text:span text:style-name="T3">Crearemos dos grupos de dominio, el grupo "</text:span><text:span text:style-name="Strong_20_Emphasis"><text:span text:style-name="T3">AulaXXX</text:span></text:span><text:span text:style-name="T3">" y el grupo "</text:span><text:span text:style-name="Strong_20_Emphasis"><text:span text:style-name="T3">DepartamentoXXX</text:span></text:span><text:span text:style-name="T3">".<text:line-break/>Tendremos que hacer miembros del grupo </text:span><text:span text:style-name="Strong_20_Emphasis"><text:span text:style-name="T3">AulaXXX</text:span></text:span><text:span text:style-name="T3"> a los usuarios creados en el apartado anterior.<text:line-break/><text:line-break/>Recordemos que "XXX" serán las iniciales del alumno, ejemplo: para Antonio Moreno Aguilera, el grupo creado será "AulaAMA".</text:span></text:p>
          <text:p text:style-name="P6"/>
          <text:p text:style-name="P6"><text:span text:style-name="Strong_20_Emphasis"><text:span text:style-name="T3">RA04_e) Se han creado plantillas que faciliten la administración de usuarios con características similares</text:span></text:span></text:p>
          <text:p text:style-name="P4">Se necesitan crear varias cuentas de usuario del dominio con algunas características comunes, ya que van a pertenecer al mismo departamento de trabajo.</text:p>
          <text:p text:style-name="P6"><text:span text:style-name="T3">En concreto las cuentas de usuario de las que hablamos deben de:<text:line-break/><text:line-break/>- Pertenecer al grupo </text:span><text:span text:style-name="Strong_20_Emphasis"><text:span text:style-name="T3">DepartamentoXXX</text:span></text:span><text:span text:style-name="T3"><text:line-break/><text:line-break/>- Tener como ruta de acceso al perfil </text:span><text:span text:style-name="Strong_20_Emphasis"><text:span text:style-name="T3">\\SERVER_XXX\perfiles\nombredeiniciodesesióndeusuario</text:span></text:span></text:p>
          <text:p text:style-name="P6"><text:span text:style-name="T3">Ejemplo, si el el nombre de inicio de sesión del usuario es Antonio, la ruta de acceso al perfil será </text:span><text:span text:style-name="Strong_20_Emphasis"><text:span text:style-name="T3">\\SERVER_XXX\perfiles\Antonio.<text:line-break/></text:span></text:span><text:span text:style-name="T3">Usa la variable de entorno adecuada para la asignación de este perfil.<text:line-break/>No es necesario que crear el directorio "perfiles" para la realización de esta parte de la tarea, podemos suponer que existe.</text:span></text:p>
          <text:p text:style-name="P6"><text:span text:style-name="T3"><text:line-break/>Para conseguir esto se debe de crear una cuenta de usuario plantilla, llamada </text:span><text:span text:style-name="Strong_20_Emphasis"><text:span text:style-name="T3">Plantilla_XXX</text:span></text:span><text:span text:style-name="T3">, que cumpla con los dos requisitos comentados anteriormente (pertenecer a ese grupo y tener la ruta de acceso al perfil descrita). Nos servirá para crear nuevos usuarios con esas características comunes.</text:span></text:p>
          <text:p text:style-name="P6"><text:span text:style-name="Strong_20_Emphasis"><text:span text:style-name="T3">Incluir en el informe de la tarea las capturas y comentarios que se crean necesarios para demostrar que se han realizado las acciones solicitadas en los distintos apartados.</text:span></text:span></text:p>
        </text:section>
      </text:section>
      <text:section text:style-name="Sect1" text:name="id26">
        <text:p text:style-name="P11"/>
        <text:section text:style-name="Sect1" text:name="ta26_1">
          <text:p text:style-name="P1">¿Qué debes tener en cuenta para resolver la tarea?</text:p>
          <table:table table:name="Tabla2" table:style-name="Tabla2">
            <table:table-column table:style-name="Tabla2.A"/>
            <table:table-row>
              <table:table-cell table:style-name="Tabla2.A1" office:value-type="string">
                <text:p text:style-name="P2"><text:span text:style-name="Strong_20_Emphasis"><text:span text:style-name="T4">CONSEJOS Y RECOMENDACIONES PARA REALIZAR LA TAREA</text:span></text:span><text:span text:style-name="T5"/></text:p>
              </table:table-cell>
            </table:table-row>
          </table:table>
          <table:table table:name="Tabla3" table:style-name="Tabla3">
            <table:table-column table:style-name="Tabla3.A"/>
            <table:table-row>
              <table:table-cell table:style-name="Tabla3.A1" office:value-type="string">
                <text:p text:style-name="P12">Para realizar esta tarea es aconsejable seguir los siguientes pasos:</text:p>
                <text:p text:style-name="P13"><text:span text:style-name="T6">Si necesitamos instalar el sistema operativo Server 2019, podemos ayudarnos de la información contenida en los ejercicios resueltos “</text:span><text:span text:style-name="Strong_20_Emphasis"><text:span text:style-name="T6">Requisitos de instalación de Windows Server</text:span></text:span><text:span text:style-name="T6">”, “</text:span><text:span text:style-name="Strong_20_Emphasis"><text:span text:style-name="T6">Crear una máquina virtual para instalar Windows Server</text:span></text:span><text:span text:style-name="T6">”, “</text:span><text:span text:style-name="Strong_20_Emphasis"><text:span text:style-name="T6">Obtener Windows Server</text:span></text:span><text:span text:style-name="T6">” e “</text:span><text:span text:style-name="Strong_20_Emphasis"><text:span text:style-name="T6">Instalación de Windows Server</text:span></text:span><text:span text:style-name="T6">” de la unidad 04.</text:span></text:p>
                <text:p text:style-name="P12">Para configurar la dirección IP del adaptador de red bajo el sistema operativo Windows puede consultar la unidad 2 Administración de software de base, concretamente el epígrafe “Configuración TCP/IP en un cliente de red utilizando sistemas operativos libres y propietarios” en su apartado referente a Windows.</text:p>
                <text:p text:style-name="P13"><text:soft-page-break/><text:span text:style-name="T6">Para realizar el cambio de nombre del servidor es aconsejable la consulta del ejercicio resuelto “</text:span><text:span text:style-name="Strong_20_Emphasis"><text:span text:style-name="T6">Cambiar el nombre de un Servidor con Windows Server</text:span></text:span><text:span text:style-name="T6">” de la unidad 4.</text:span></text:p>
                <text:p text:style-name="P13"><text:span text:style-name="T6">Para el apartado RA04_a) y la instalación de los Servicios de directorio Active Directory, sería aconsejable repasar el epígrafe “Implantación de un dominio utilizando sistemas operativos libres y propietarios” de la unidad 4, así como también revisar la sesión on-line “Instalación de un ADDS” y el ejercicio resuelto “</text:span><text:span text:style-name="Strong_20_Emphasis"><text:span text:style-name="T6">Asistente de roles de Windows Server</text:span></text:span><text:span text:style-name="T6">”.</text:span></text:p>
                <text:p text:style-name="P13"><text:span text:style-name="T6">En el apartado RA04_b), se nos pide crear usuarios y grupos de dominio, para facilitar este trabajo sería conveniente tener en cuenta el ejercicio resuelto “</text:span><text:span text:style-name="Strong_20_Emphasis"><text:span text:style-name="T6">Crear una cuenta de usuario del dominio</text:span></text:span><text:span text:style-name="T6">”, así como el epígrafe “Cuentas de usuario y equipos” de la unidad 4.</text:span></text:p>
                <text:p text:style-name="P12">Para el apartado RA04_d), la creación de un grupo en el dominio, puede consultar el epígrafe “Administración de grupos. Tipos. Estrategias de anidamiento. Grupos predeterminados”, y el vídeo concepto "Administración de grupos" de la unidad 04.</text:p>
                <text:p text:style-name="P12">Para la realización del apartado RA04_e) tenga en cuenta lo explicado en el vídeo concepto "Plantillas de usuario" y en el epígrafe "Plantillas de usuario. Variables de entorno" de la unidad 04.<text:span text:style-name="T7"/></text:p>
              </table:table-cell>
            </table:table-row>
          </table:table>
          <text:p text:style-name="P14"/>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06:19:04.176003400</meta:creation-date>
    <dc:date>2026-06-15T06:19:25.237976500</dc:date>
    <meta:editing-duration>PT21S</meta:editing-duration>
    <meta:editing-cycles>1</meta:editing-cycles>
    <meta:document-statistic meta:table-count="3" meta:image-count="0" meta:object-count="0" meta:page-count="3" meta:paragraph-count="41" meta:word-count="911" meta:character-count="5914" meta:non-whitespace-character-count="5036"/>
    <meta:generator>LibreOffice/26.2.3.2$Windows_X86_64 LibreOffice_project/70e089b17412e4cb7773e41413306b17a2328c34</meta:generator>
  </office:meta>
</office:document-meta>
</file>