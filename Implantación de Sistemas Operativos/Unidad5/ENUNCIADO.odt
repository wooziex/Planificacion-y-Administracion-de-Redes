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8.151cm" table:align="left"/>
    </style:style>
    <style:style style:name="Tabla1.A" style:family="table-column">
      <style:table-column-properties style:column-width="8.151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5.436cm" table:align="left"/>
    </style:style>
    <style:style style:name="Tabla2.A" style:family="table-column">
      <style:table-column-properties style:column-width="15.436cm"/>
    </style:style>
    <style:style style:name="Tabla2.A1" style:family="table-cell">
      <style:table-cell-properties style:vertical-align="middle" fo:background-color="#c3dcf7" fo:padding="0.049cm" fo:border="0.5pt solid #d4e0ee">
        <style:background-image/>
      </style:table-cell-properties>
    </style:style>
    <style:style style:name="Tabla3" style:family="table">
      <style:table-properties style:width="17cm" table:align="left"/>
    </style:style>
    <style:style style:name="Tabla3.A" style:family="table-column">
      <style:table-column-properties style:column-width="17cm"/>
    </style:style>
    <style:style style:name="Tabla3.A1"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loext:padding="0cm" loext:border="none"/>
    </style:style>
    <style:style style:name="P8" style:family="paragraph" style:parent-style-name="Text_20_body" style:list-style-name="L1">
      <style:paragraph-properties fo:margin-left="0cm" fo:margin-right="0cm" fo:margin-top="0.265cm" fo:margin-bottom="0.247cm" style:contextual-spacing="false" fo:text-align="justify" style:justify-single-word="false" fo:orphans="2" fo:widows="2"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11" style:family="paragraph" style:parent-style-name="Table_20_Contents">
      <style:paragraph-properties fo:margin-left="0cm" fo:margin-right="0cm" fo:margin-top="0cm" fo:margin-bottom="0cm" style:contextual-spacing="false" fo:text-indent="0cm" style:auto-text-indent="false"/>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font-variant="normal" fo:text-transform="none" fo:color="#000000" loext:opacity="100%" style:font-name="HelveticaNeue-Light" fo:font-size="12pt" fo:letter-spacing="normal" fo:font-style="normal" fo:font-weight="normal" loext:padding="0cm" loext:border="none"/>
    </style:style>
    <style:style style:name="T4" style:family="text">
      <style:text-properties fo:font-variant="normal" fo:text-transform="none" fo:color="#000000" loext:opacity="100%" fo:letter-spacing="normal" loext:padding="0cm" loext:border="none"/>
    </style:style>
    <style:style style:name="T5" style:family="text">
      <style:text-properties fo:color="#153152" loext:opacity="100%" style:font-name="HelveticaNeue-Light" fo:font-size="14pt" fo:font-weight="bold"/>
    </style:style>
    <style:style style:name="T6" style:family="text">
      <style:text-properties fo:color="#153152" loext:opacity="100%" style:font-name="HelveticaNeue-Light" fo:font-size="14pt" fo:font-weight="bold" style:font-name-asian="HelveticaNeue-Light" style:font-weight-asian="bold" style:font-name-complex="HelveticaNeue-Light" style:font-weight-complex="bold"/>
    </style:style>
    <style:style style:name="T7" style:family="text">
      <style:text-properties fo:color="#555555" loext:opacity="100%" style:font-name="HelveticaNeue-Light"/>
    </style:style>
    <style:style style:name="T8" style:family="text">
      <style:text-properties fo:color="#555555" loext:opacity="100%" style:font-name="HelveticaNeue-Light" style:font-name-asian="HelveticaNeue-Light" style:font-name-complex="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
              </table:table-cell>
            </table:table-row>
          </table:table>
          <text:p text:style-name="P4">En esta tarea aprenderemos a administrar el acceso a un dominio con Active Directory, implementado en un servidor con Windows Server 2019. </text:p>
          <text:p text:style-name="P4">Algunas de las funciones que trabajaremos serán las de trabajar con usuarios y equipos del dominio.</text:p>
        </text:section>
      </text:section>
      <text:section text:style-name="Sect1" text:name="id25">
        <text:p text:style-name="P5"/>
        <text:section text:style-name="Sect1" text:name="ta25_1">
          <text:p text:style-name="P6">En esta tarea deberemos partir de una máquina virtual con Windows Server 2019 instalado y un dominio activo.</text:p>
          <text:p text:style-name="P7"> </text:p>
          <text:p text:style-name="P6"><text:span text:style-name="T3">Se recomienda usar la máquina virtual con la que se realizó la tarea anterior, en donde se trabajó con un dominio llamado </text:span><text:span text:style-name="Strong_20_Emphasis"><text:span text:style-name="T3">XXX.local</text:span></text:span><text:span text:style-name="T3">. </text:span></text:p>
          <text:p text:style-name="P6"><text:span text:style-name="T3">Donde "XXX" serán las iniciales del alumno, ejemplo: para Antonio Moreno Aguilera, el dominio creado sería "</text:span><text:span text:style-name="Strong_20_Emphasis"><text:span text:style-name="T3">AMA.</text:span></text:span><text:span text:style-name="T3">local".</text:span></text:p>
          <text:p text:style-name="P4"><text:line-break/>En otro caso:</text:p>
          <text:p text:style-name="P6"><text:span text:style-name="T3">Se puede instalar Windows Server sobre una máquina virtual desde cero o se puede usar la máquina virtual con Windows Server 2019 de la sección de recursos adicionales.<text:line-break/>Se debe de trabajar con un dominio llamado </text:span><text:span text:style-name="Strong_20_Emphasis"><text:span text:style-name="T3">XXX.local</text:span></text:span><text:span text:style-name="T3">. </text:span></text:p>
          <text:p text:style-name="P6"><text:span text:style-name="T3">Donde "XXX" serán las iniciales del alumno, ejemplo: para Antonio Moreno Aguilera, el dominio creado sería "</text:span><text:span text:style-name="Strong_20_Emphasis"><text:span text:style-name="T3">AMA.local</text:span></text:span><text:span text:style-name="T3">".</text:span></text:p>
          <text:p text:style-name="P6"><text:span text:style-name="Strong_20_Emphasis"><text:span text:style-name="T3"><text:line-break/><text:line-break/>Realice los siguientes pasos para trabajar la tarea:</text:span></text:span></text:p>
          <text:p text:style-name="P7"> </text:p>
          <text:p text:style-name="P6"><text:span text:style-name="Strong_20_Emphasis"><text:span text:style-name="T3">RA05_a) Se han incorporado equipos al dominio</text:span></text:span></text:p>
          <text:p text:style-name="P6"><text:span text:style-name="Strong_20_Emphasis"><text:span text:style-name="T4"> </text:span></text:span></text:p>
          <text:p text:style-name="P4">1.- Muestre una captura de pantalla con la dirección IP que tiene asignada el servidor que está usando para esta tarea.</text:p>
          <text:p text:style-name="P7"> </text:p>
          <text:p text:style-name="P4">Para poder trabajar con un equipo en el dominio gestionado por su servidor (XXX.local), se debe de agregar dicho equipo al dominio. Esto requiere cumplir algunos requisitos, teniendo en cuenta estos requisitos, responda a las siguientes preguntas:</text:p>
          <text:p text:style-name="P7"> </text:p>
          <text:p text:style-name="P4">2.- Indique una dirección IP válida para ser asignada al equipo que va a ser agregado al dominio XXX.local de su servidor.</text:p>
          <text:p text:style-name="P7"> </text:p>
          <text:p text:style-name="P4">3.- Indique la dirección IP del servidor DNS primario que debe de tener el equipo que va a ser agregado al dominio XXX.local de su servidor, para poder ingresar al dominio.</text:p>
          <text:p text:style-name="P7"> </text:p>
          <text:p text:style-name="P4">No es necesario hacer la práctica de agregar el equipo al dominio, simplemente realizar lo que se pide en este apartado.</text:p>
          <text:p text:style-name="P6"><text:span text:style-name="Strong_20_Emphasis"><text:span text:style-name="T4"> </text:span></text:span></text:p>
          <text:p text:style-name="P6"><text:span text:style-name="Strong_20_Emphasis"><text:span text:style-name="T3">RA05_b)</text:span></text:span><text:span text:style-name="T3"> </text:span><text:span text:style-name="Strong_20_Emphasis"><text:span text:style-name="T3">Se han previsto bloqueos de accesos no autorizados al dominio. </text:span></text:span></text:p>
          <text:p text:style-name="P6"><text:soft-page-break/><text:span text:style-name="Strong_20_Emphasis"><text:span text:style-name="T4"> </text:span></text:span></text:p>
          <text:p text:style-name="P4">Se puede conceder determinados privilegios y derechos de inicio de sesión a los usuarios y grupos del sistema. Los administradores pueden asignar derechos específicos a las cuentas de grupo o a cuentas de usuario individuales, entre estos derechos están los derechos de conexión.</text:p>
          <text:p text:style-name="P7"> </text:p>
          <text:p text:style-name="P4">Los derechos de conexión establecen diferentes formas en que un usuario puede conectarse al sistema.</text:p>
          <text:p text:style-name="P7"> </text:p>
          <text:p text:style-name="P4">Indica al menos dos de estos derechos de conexión.</text:p>
          <text:p text:style-name="P6"><text:span text:style-name="Strong_20_Emphasis"><text:span text:style-name="T4"> </text:span></text:span></text:p>
          <text:p text:style-name="P6"><text:span text:style-name="Strong_20_Emphasis"><text:span text:style-name="T3">RA05_c) Se ha administrado el acceso a recursos locales y recursos de red.</text:span></text:span></text:p>
          <text:p text:style-name="P6"><text:span text:style-name="T3"><text:line-break/>Deberemos crear en el Servidor del dominio una carpeta nombrada como "</text:span><text:span text:style-name="Strong_20_Emphasis"><text:span text:style-name="T3">TrabajoXXX</text:span></text:span><text:span text:style-name="T3">", Donde "XXX" serán las iniciales del alumno.</text:span></text:p>
          <text:p text:style-name="P7"> </text:p>
          <text:p text:style-name="P6"><text:span text:style-name="T3">Compartiremos la carpeta "</text:span><text:span text:style-name="Strong_20_Emphasis"><text:span text:style-name="T3">TrabajoXXX</text:span></text:span><text:span text:style-name="T3">", de forma que:</text:span></text:p>
          <text:list text:style-name="L1">
            <text:list-item>
              <text:list>
                <text:list-item>
                  <text:p text:style-name="P8"><text:span text:style-name="T3">El usuario del dominio: </text:span><text:span text:style-name="Strong_20_Emphasis"><text:span text:style-name="T3">DirectorXXX</text:span></text:span><text:span text:style-name="T3">, pueda iniciar sesión en el dominio en una máquina Windows 10 y acceder a través de la red para escribir y leer información en dicha carpeta.</text:span></text:p>
                </text:list-item>
                <text:list-item>
                  <text:p text:style-name="P8"><text:span text:style-name="T3">El usuario del dominio: </text:span><text:span text:style-name="Strong_20_Emphasis"><text:span text:style-name="T3">EmpleadoXXX</text:span></text:span><text:span text:style-name="T3">, pueda iniciar sesión en el dominio en una máquina Windows 10 y acceder a través de la red para leer información, pero no escribir en dicha carpeta.</text:span></text:p>
                </text:list-item>
              </text:list>
            </text:list-item>
          </text:list>
          <text:p text:style-name="P4">En el nombre de los usuarios, "XXX" serán las iniciales del alumno.<text:line-break/>Ninguno de los dos usuarios debe tener control total sobre la carpeta, simplemente los permisos que se han descrito.<text:line-break/>No es necesario comprobar iniciando sesión con cada usuario, basta con asignar los permisos a la carpeta de forma adecuada.</text:p>
          <text:p text:style-name="P4"><text:line-break/></text:p>
          <text:p text:style-name="P6"><text:span text:style-name="Strong_20_Emphasis"><text:span text:style-name="T3">Incluir en el informe de la tarea las capturas y comentarios que se crean necesarios para demostrar que se han realizado las acciones solicitadas en los distintos apartados.</text:span></text:span></text:p>
        </text:section>
      </text:section>
      <text:section text:style-name="Sect1" text:name="id26">
        <text:p text:style-name="P9"/>
        <text:section text:style-name="Sect1" text:name="ta26_1">
          <text:p text:style-name="P1">¿Qué debes tener en cuenta para resolver la tarea?</text:p>
          <table:table table:name="Tabla2" table:style-name="Tabla2">
            <table:table-column table:style-name="Tabla2.A"/>
            <table:table-row>
              <table:table-cell table:style-name="Tabla2.A1" office:value-type="string">
                <text:p text:style-name="P2"><text:span text:style-name="Strong_20_Emphasis"><text:span text:style-name="T5">CONSEJOS Y RECOMENDACIONES PARA REALIZAR LA TAREA</text:span></text:span><text:span text:style-name="T6"/></text:p>
              </table:table-cell>
            </table:table-row>
          </table:table>
          <table:table table:name="Tabla3" table:style-name="Tabla3">
            <table:table-column table:style-name="Tabla3.A"/>
            <table:table-row>
              <table:table-cell table:style-name="Tabla3.A1" office:value-type="string">
                <text:p text:style-name="P10">Para realizar esta tarea es aconsejable usar la máquina que utilizó en la tarea de la unidad anterior, que ya tendrá configurado un dominio activo.</text:p>
                <text:p text:style-name="P10">Si no puede usar esa máquina de la tarea anterior, necesitará montar un escenario adecuado con Windows Server 2019 y un dominio activo. Tenga en cuenta entonces:</text:p>
                <text:p text:style-name="P10">Si necesitamos instalar el sistema operativo Server 2019, podemos ayudarnos de la información contenida en los ejercicios resueltos “Requisitos de instalación de Windows Server”, “Crear una máquina virtual para instalar Windows Server”, “Obtener Windows Server” e “Instalación de Windows Server” de la unidad 04.</text:p>
                <text:p text:style-name="P10">Si se necesita implantar un dominio en la máquina con Windows Server, tenga en cuenta que para configurar la dirección IP del adaptador de red bajo el sistema operativo <text:soft-page-break/>Windows puede consultar la unidad 2 Administración de software de base, concretamente el epígrafe “Configuración TCP/IP en un cliente de red utilizando sistemas operativos libres y propietarios” en su apartado referente a Windows.</text:p>
                <text:p text:style-name="P10">Para realizar el cambio de nombre del servidor es aconsejable la consulta del ejercicio resuelto “Cambiar el nombre de un Servidor con Windows Server” de la unidad 4.</text:p>
                <text:p text:style-name="P10">Recuerde que para la instalación de los Servicios de directorio Active Directory, (si necesita hacerlo para esta tarea) sería aconsejable repasar el epígrafe “Implantación de un dominio utilizando sistemas operativos libres y propietarios” de la unidad 4, así como también revisar la sesión on-line “Instalación de un ADDS” y el ejercicio resuelto “Acceder al asistente de roles”.</text:p>
                <text:p text:style-name="P11"><text:span text:style-name="Strong_20_Emphasis"><text:span text:style-name="T7">Para los pasos que se requieren en la tarea 5, tenga en cuenta:</text:span></text:span><text:span text:style-name="T7"> </text:span></text:p>
                <text:p text:style-name="P10">Para el apartado RA05_a) le será de gran ayuda consultar el ejercicio resuelto “Unir Equipo a un Dominio” de la unidad 05.</text:p>
                <text:p text:style-name="P10"><text:line-break/>Para responder a la pregunta sobre los derechos de conexión le sería de utilidad consultar el Epígrafe 9.1 Derechos de usuario, de la unidad 05.</text:p>
                <text:p text:style-name="P10"><text:line-break/>Para la asignación de permisos a los usuarios puede consultar los ejercicios resueltos "Significado de los permisos NTFS" y "Deshabilitar la herencia en los permisos" de la unidad 05, así como la sesión online "Permisos".<text:span text:style-name="T8"/></text:p>
              </table:table-cell>
            </table:table-row>
          </table:table>
          <text:p text:style-name="P12"/>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6:19:49.282689700</meta:creation-date>
    <dc:date>2026-06-15T06:20:05.776451600</dc:date>
    <meta:editing-duration>PT16S</meta:editing-duration>
    <meta:editing-cycles>1</meta:editing-cycles>
    <meta:document-statistic meta:table-count="3" meta:image-count="0" meta:object-count="0" meta:page-count="3" meta:paragraph-count="54" meta:word-count="923" meta:character-count="5704" meta:non-whitespace-character-count="4798"/>
    <meta:generator>LibreOffice/26.2.3.2$Windows_X86_64 LibreOffice_project/70e089b17412e4cb7773e41413306b17a2328c34</meta:generator>
  </office:meta>
</office:document-meta>
</file>