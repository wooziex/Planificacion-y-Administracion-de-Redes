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8.151cm" table:align="left"/>
    </style:style>
    <style:style style:name="Tabla1.A" style:family="table-column">
      <style:table-column-properties style:column-width="8.151cm"/>
    </style:style>
    <style:style style:name="Tabla1.1" style:family="table-row">
      <style:table-row-properties fo:background-color="#fcfdfe">
        <style:background-image/>
      </style:table-row-properties>
    </style:style>
    <style:style style:name="Tabla1.A1" style:family="table-cell">
      <style:table-cell-properties style:vertical-align="middle" fo:background-color="#c3dcf7" fo:padding="0.049cm" fo:border="0.5pt solid #d4e0ee">
        <style:background-image/>
      </style:table-cell-properties>
    </style:style>
    <style:style style:name="Tabla1.A2" style:family="table-cell">
      <style:table-cell-properties style:vertical-align="middle" fo:padding="0.049cm" fo:border="0.5pt solid #d4e0ee"/>
    </style:style>
    <style:style style:name="P1" style:family="paragraph" style:parent-style-name="Text_20_body">
      <style:paragraph-properties fo:margin-top="0cm" fo:margin-bottom="0cm" style:contextual-spacing="false" fo:text-align="center" style:justify-single-word="false"/>
    </style:style>
    <style:style style:name="P2" style:family="paragraph" style:parent-style-name="Table_20_Heading">
      <style:paragraph-properties fo:margin-left="0cm" fo:margin-right="0cm" fo:margin-top="0cm" fo:margin-bottom="0cm" style:contextual-spacing="false" fo:text-align="center" style:justify-single-word="false" fo:text-indent="0cm" style:auto-text-indent="false"/>
    </style:style>
    <style:style style:name="P3" style:family="paragraph" style:parent-style-name="Table_20_Contents">
      <style:text-properties fo:font-size="2pt" style:font-size-asian="2pt" style:font-size-complex="2pt"/>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style:font-name="HelveticaNeue-Light" fo:font-size="12pt" fo:letter-spacing="normal" fo:font-style="normal" fo:font-weight="normal" loext:padding="0cm" loext:border="none"/>
    </style:style>
    <style:style style:name="P5"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style>
    <style:style style:name="P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style>
    <style:style style:name="P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fo:letter-spacing="normal" loext:padding="0cm" loext:border="none"/>
    </style:style>
    <style:style style:name="T1" style:family="text">
      <style:text-properties fo:color="#153152" loext:opacity="100%" style:font-name="HelveticaNeue-Light" fo:font-size="18pt" fo:font-weight="bold"/>
    </style:style>
    <style:style style:name="T2" style:family="text">
      <style:text-properties fo:color="#153152" loext:opacity="100%" style:font-name="HelveticaNeue-Light" fo:font-size="18pt" fo:font-weight="bold" style:font-name-asian="HelveticaNeue-Light" style:font-weight-asian="bold" style:font-name-complex="HelveticaNeue-Light" style:font-weight-complex="bold"/>
    </style:style>
    <style:style style:name="T3" style:family="text">
      <style:text-properties fo:font-variant="normal" fo:text-transform="none" fo:color="#000000" loext:opacity="100%" style:font-name="HelveticaNeue-Light" fo:font-size="12pt" fo:letter-spacing="normal" fo:font-style="normal" fo:font-weight="normal" loext:padding="0cm" loext:border="none"/>
    </style:style>
    <style:style style:name="T4" style:family="text">
      <style:text-properties fo:font-variant="normal" fo:text-transform="none" fo:color="#000000" loext:opacity="100%" fo:letter-spacing="normal" loext:padding="0cm" loext:border="non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id24">
        <text:section text:style-name="Sect1" text:name="ta24_1">
          <text:p text:style-name="P1">Introducción de la tarea</text:p>
          <table:table table:name="Tabla1" table:style-name="Tabla1">
            <table:table-column table:style-name="Tabla1.A"/>
            <table:table-row table:style-name="Tabla1.1">
              <table:table-cell table:style-name="Tabla1.A1" office:value-type="string">
                <text:p text:style-name="P2"><text:span text:style-name="Strong_20_Emphasis"><text:span text:style-name="T1">CONTEXTO DE LA TAREA</text:span></text:span><text:span text:style-name="T2"/></text:p>
              </table:table-cell>
            </table:table-row>
            <table:table-row table:style-name="Tabla1.1">
              <table:table-cell table:style-name="Tabla1.A2" office:value-type="string">
                <text:p text:style-name="P3"/>
              </table:table-cell>
            </table:table-row>
          </table:table>
          <text:p text:style-name="P4">En esta tarea se propone la configuración de directivas de seguridad y aplicación de derechos de usuario, se trabajará en este aspecto en un sistema operativo cliente, sin contar con un entorno cliente servidor.</text:p>
          <text:p text:style-name="P4">En esta tarea se aplicarán también conocimientos sobre gestión de auditorías en un ADDS, en este caso si se trabajará con un entorno de red Microsoft, donde se configurarán las auditorías sobre objetos de un dominio. </text:p>
        </text:section>
      </text:section>
      <text:section text:style-name="Sect1" text:name="id25">
        <text:p text:style-name="P5"/>
        <text:section text:style-name="Sect1" text:name="ta25_1">
          <text:p text:style-name="P6"><text:span text:style-name="Strong_20_Emphasis">Consideraciones previas:</text:span><text:line-break/><text:line-break/>En esta tarea deberemos partir de una máquina virtual con Windows Server instalado y un dominio activo.</text:p>
          <text:p text:style-name="P6"><text:span text:style-name="T3">Se recomienda usar la máquina virtual con la que se realizó la tarea anterior, en donde se trabajó con un dominio llamado </text:span><text:span text:style-name="Strong_20_Emphasis"><text:span text:style-name="T3">XXX.local</text:span></text:span><text:span text:style-name="T3">.</text:span></text:p>
          <text:p text:style-name="P6"><text:span text:style-name="T3">Se trabajará con los usuarios del dominio: </text:span><text:span text:style-name="Strong_20_Emphasis"><text:span text:style-name="T3">EmpleadoXXX</text:span></text:span><text:span text:style-name="T3">.</text:span></text:p>
          <text:p text:style-name="P4">Donde "XXX" serán las iniciales del alumno, por ejemplo: para Antonio Moreno Aguilera, el dominio creado sería "AMA.local" y los usuarios: “EmpleadoAMA”.</text:p>
          <text:p text:style-name="P7"> </text:p>
          <text:p text:style-name="P4">En otro caso, si no se trabaja con la máquina virtual de anteriores tareas:</text:p>
          <text:p text:style-name="P6"><text:span text:style-name="T3">Se puede instalar Windows Server sobre una máquina virtual desde cero o se puede usar la máquina virtual con Windows Server de la sección de máquinas virtuales. Se debe de trabajar con un dominio llamado </text:span><text:span text:style-name="Strong_20_Emphasis"><text:span text:style-name="T3">XXX.local</text:span></text:span><text:span text:style-name="T3">, y con los usuarios del dominio: </text:span><text:span text:style-name="Strong_20_Emphasis"><text:span text:style-name="T3">EmpleadoXXX</text:span></text:span><text:span text:style-name="T3">.</text:span></text:p>
          <text:p text:style-name="P7"> </text:p>
          <text:p text:style-name="P6"><text:span text:style-name="T3">Previo al comienzo de la tarea: Deberemos trabajar en el Servidor del dominio con una carpeta nombrada como "</text:span><text:span text:style-name="Strong_20_Emphasis"><text:span text:style-name="T3">TrabajoXXX</text:span></text:span><text:span text:style-name="T3">", Donde "XXX" serán las iniciales del alumno.</text:span></text:p>
          <text:p text:style-name="P6"><text:span text:style-name="T3">Compartiremos la carpeta "</text:span><text:span text:style-name="Strong_20_Emphasis"><text:span text:style-name="T3">TrabajoXXX</text:span></text:span><text:span text:style-name="T3">", de forma que:</text:span></text:p>
          <text:p text:style-name="P6"><text:span text:style-name="T3">- El usuario del dominio: </text:span><text:span text:style-name="Strong_20_Emphasis"><text:span text:style-name="T3">EmpleadoXXX</text:span></text:span><text:span text:style-name="T3">, pueda iniciar sesión en el dominio en una máquina Windows 10 y acceder a través de la red para leer información, pero no escribir en dicha carpeta.</text:span></text:p>
          <text:p text:style-name="P6"><text:span text:style-name="T3">- El usuario</text:span><text:span text:style-name="Strong_20_Emphasis"><text:span text:style-name="T3"> EmpleadoXXX no</text:span></text:span><text:span text:style-name="T3"> </text:span><text:span text:style-name="Strong_20_Emphasis"><text:span text:style-name="T3">debe</text:span></text:span><text:span text:style-name="T3"> </text:span><text:span text:style-name="Strong_20_Emphasis"><text:span text:style-name="T3">tener control total</text:span></text:span><text:span text:style-name="T3"> sobre la carpeta, simplemente los permisos que se han descrito.</text:span></text:p>
          <text:p text:style-name="P7"> </text:p>
          <text:p text:style-name="P6"><text:span text:style-name="Strong_20_Emphasis"><text:span text:style-name="T3"><text:line-break/><text:line-break/>Una vez preparado este escenario, realice los siguientes pasos, y en el orden en que aparecen, para trabajar la tarea:</text:span></text:span></text:p>
          <text:p text:style-name="P6"><text:span text:style-name="T3"><text:line-break/></text:span><text:span text:style-name="Strong_20_Emphasis"><text:span text:style-name="T3">RA07_e) Se han auditado sucesos correctos y erróneos.</text:span></text:span></text:p>
          <text:p text:style-name="P7"> </text:p>
          <text:p text:style-name="P4">Realice un plan de auditoría, en el escenario de Windows Server que se ha descrito para esta tarea, de forma que se audite el acceso a objetos.</text:p>
          <text:p text:style-name="P4">En primer lugar deberá activar y configurar adecuadamente la directiva “auditar el acceso a objetos” aplicada a “Default Domain Policy”.</text:p>
          <text:p text:style-name="P7"><text:soft-page-break/> </text:p>
          <text:p text:style-name="P4">En segundo lugar siga los pasos necesarios para auditar:</text:p>
          <text:p text:style-name="P7"> </text:p>
          <text:p text:style-name="P6"><text:span text:style-name="T3">Los intentos </text:span><text:span text:style-name="Strong_20_Emphasis"><text:span text:style-name="T3">erróneos</text:span></text:span><text:span text:style-name="T3"> de </text:span><text:span text:style-name="Strong_20_Emphasis"><text:span text:style-name="T3">escritura</text:span></text:span><text:span text:style-name="T3"> y </text:span><text:span text:style-name="Strong_20_Emphasis"><text:span text:style-name="T3">modificación</text:span></text:span><text:span text:style-name="T3"> del usuario </text:span><text:span text:style-name="Strong_20_Emphasis"><text:span text:style-name="T3">EmpleadoXXX</text:span></text:span><text:span text:style-name="T3"> sobre el directorio </text:span><text:span text:style-name="Strong_20_Emphasis"><text:span text:style-name="T3">TrabajoXXX</text:span></text:span><text:span text:style-name="T3">.</text:span></text:p>
          <text:p text:style-name="P7"> </text:p>
          <text:p text:style-name="P4">No será necesario iniciar sesión con el usuario y realizar acciones para la comprobación de la auditoría, será suficiente con mostrar que se han definido correctamente las auditorías que se piden.</text:p>
          <text:p text:style-name="P6"><text:span text:style-name="Strong_20_Emphasis"><text:span text:style-name="T4"> </text:span></text:span></text:p>
          <text:p text:style-name="P6"><text:span text:style-name="Strong_20_Emphasis"><text:span text:style-name="T4"> </text:span></text:span></text:p>
          <text:p text:style-name="P6"><text:span text:style-name="Strong_20_Emphasis"><text:span text:style-name="T3">RA07_c) Se ha elaborado un plan de auditorías.</text:span></text:span></text:p>
          <text:p text:style-name="P7"> </text:p>
          <text:p text:style-name="P6"><text:span text:style-name="T3">Uno de los pasos que habrá usado para elaborar el plan de auditorías sobre la carpeta </text:span><text:span text:style-name="Strong_20_Emphasis"><text:span text:style-name="T3">TrabajoXXX</text:span></text:span><text:span text:style-name="T3">, (con la que ha trabajado en el apartado e), es agregar una entrada de auditoría para la carpeta </text:span><text:span text:style-name="Strong_20_Emphasis"><text:span text:style-name="T3">TrabajoXXX</text:span></text:span><text:span text:style-name="T3">.</text:span></text:p>
          <text:p text:style-name="P4">Muestre la ventana donde se configura esta entrada de auditoría (ventana donde se configura la entidad de seguridad, el tipo de auditoría, los permisos, etc).</text:p>
          <text:p text:style-name="P7"> </text:p>
          <text:p text:style-name="P7"> </text:p>
          <text:p text:style-name="P7"> </text:p>
          <text:p text:style-name="P6"><text:span text:style-name="Strong_20_Emphasis"><text:span text:style-name="T3">RA07_f) Se han auditado los intentos de acceso y los accesos a recursos del sistema.</text:span></text:span></text:p>
          <text:p text:style-name="P7"> </text:p>
          <text:p text:style-name="P4">Indique, cuál es el nombre de cada una de las directivas de auditoría que registra los siguientes eventos:</text:p>
          <text:p text:style-name="P7"> </text:p>
          <text:p text:style-name="P4">- Directiva de auditoría que registra los intentos de acceso de los usuarios a recursos del sistema como impresoras, carpetas o archivos.</text:p>
          <text:p text:style-name="P4">- Directiva de auditoría que registra todos los accesos de inicio de sesión de los usuarios</text:p>
          <text:p text:style-name="P4">- Directiva de auditoría que registra todos los accesos a programas o procesos que lanza el usuario cuando se accede al sistema.</text:p>
          <text:p text:style-name="P4">- Directiva de auditoría que registra todos los intentos de modificación de las cuentas de usuarios</text:p>
          <text:p text:style-name="P7"> </text:p>
          <text:p text:style-name="P7"> </text:p>
          <text:p text:style-name="P6"><text:span text:style-name="Strong_20_Emphasis"><text:span text:style-name="T3">RA07_a) Se han administrado derechos de usuario y directivas de seguridad.</text:span></text:span></text:p>
          <text:p text:style-name="P7"> </text:p>
          <text:p text:style-name="P6"><text:span text:style-name="T3">Trabajaremos en este apartado exclusivamente con una máquina Windows 10. Deberá crear en el sistema operativo una cuenta de usuario local llamada “</text:span><text:span text:style-name="Strong_20_Emphasis"><text:span text:style-name="T3">XXXnnnnnnnn</text:span></text:span><text:span text:style-name="T3">” (donde XXX sean sus iniciales y nnnnnnnn su DNI). El usuario creado no pertenecerá a ningún grupo con privilegios, simplemente pertenecerá al grupo local “Usuarios” (normalmente esto es lo que ocurre por defecto cuando se crea un usuario).</text:span></text:p>
          <text:p text:style-name="P7"> </text:p>
          <text:p text:style-name="P4">Configure las directivas de seguridad local en esta máquina Windows 10, de modo que:</text:p>
          <text:p text:style-name="P7"> </text:p>
          <text:p text:style-name="P6"><text:span text:style-name="T3">- El </text:span><text:span text:style-name="Strong_20_Emphasis"><text:span text:style-name="T3">grupo local Usuarios</text:span></text:span><text:span text:style-name="T3"> no tendrá asignado el derecho de Apagar el sistema.</text:span></text:p>
          <text:p text:style-name="P6"><text:soft-page-break/><text:span text:style-name="T3">- El usuario local “</text:span><text:span text:style-name="Strong_20_Emphasis"><text:span text:style-name="T3">XXXnnnnnnnn</text:span></text:span><text:span text:style-name="T3">” sí tendrá asignado el derecho de Apagar el sistema.</text:span></text:p>
          <text:p text:style-name="P7"> </text:p>
          <text:p text:style-name="P4">No es necesario comprobar que se ha asignado el derecho iniciando sesión con el usuario correspondiente. Será suficiente para la valoración de este apartado incluir capturas de la ventana donde se asigna o quita el derecho al usuario y grupo solicitados.</text:p>
        </text:section>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5T06:21:33.027262900</meta:creation-date>
    <dc:date>2026-06-15T06:21:55.230783300</dc:date>
    <meta:editing-duration>PT22S</meta:editing-duration>
    <meta:editing-cycles>1</meta:editing-cycles>
    <meta:document-statistic meta:table-count="1" meta:image-count="0" meta:object-count="0" meta:page-count="3" meta:paragraph-count="57" meta:word-count="754" meta:character-count="4651" meta:non-whitespace-character-count="3907"/>
    <meta:generator>LibreOffice/26.2.3.2$Windows_X86_64 LibreOffice_project/70e089b17412e4cb7773e41413306b17a2328c34</meta:generator>
  </office:meta>
</office:document-meta>
</file>