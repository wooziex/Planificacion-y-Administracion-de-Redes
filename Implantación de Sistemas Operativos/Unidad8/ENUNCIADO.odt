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151cm" table:align="left"/>
    </style:style>
    <style:style style:name="Tabla1.A" style:family="table-column">
      <style:table-column-properties style:column-width="8.151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/>
              </table:table-cell>
            </table:table-row>
          </table:table>
          <text:p text:style-name="P4">En esta tarea se aplicarán conocimientos sobre realización de instalaciones desatendidas y el servicio de actualizaciones en un ADDS.</text:p>
          <text:p text:style-name="P4">También se propone revisar conceptos sobre la actuación para la resolución de incidencias y asistencia técnica a través de la red.</text:p>
        </text:section>
      </text:section>
      <text:section text:style-name="Sect1" text:name="id25">
        <text:p text:style-name="P5"/>
        <text:section text:style-name="Sect1" text:name="ta25_1">
          <text:p text:style-name="P6"><text:span text:style-name="Strong_20_Emphasis">Consideraciones previas:</text:span><text:line-break/><text:line-break/>En esta tarea deberemos partir de una máquina virtual con Windows Server instalado y un dominio activo.</text:p>
          <text:p text:style-name="P6"><text:span text:style-name="T3">Se recomienda usar la máquina virtual con la que se realizaron tareas anteriores, en donde se trabajó con un dominio llamado </text:span><text:span text:style-name="Strong_20_Emphasis"><text:span text:style-name="T3">XXX.local</text:span></text:span><text:span text:style-name="T3">.</text:span></text:p>
          <text:p text:style-name="P6"><text:span text:style-name="T3">Donde "</text:span><text:span text:style-name="Strong_20_Emphasis"><text:span text:style-name="T3">XXX</text:span></text:span><text:span text:style-name="T3">" serán las iniciales del alumno, por ejemplo: para Antonio Moreno Aguilera, el dominio creado sería "</text:span><text:span text:style-name="Strong_20_Emphasis"><text:span text:style-name="T3">AMA.local</text:span></text:span><text:span text:style-name="T3">".</text:span></text:p>
          <text:p text:style-name="P7"> </text:p>
          <text:p text:style-name="P4">En otro caso, si no se trabaja con la máquina virtual de anteriores tareas:</text:p>
          <text:p text:style-name="P6"><text:span text:style-name="T3">Se puede instalar Windows Server sobre una máquina virtual desde cero o se puede usar la máquina virtual con Windows Server de la sección de máquinas virtuales. Se debe de trabajar con un dominio llamado </text:span><text:span text:style-name="Strong_20_Emphasis"><text:span text:style-name="T3">XXX.local</text:span></text:span><text:span text:style-name="T3">,</text:span></text:p>
          <text:p text:style-name="P7"> </text:p>
          <text:p text:style-name="P6"><text:span text:style-name="Strong_20_Emphasis"><text:span text:style-name="T3"><text:line-break/>Realice los siguientes pasos, y en el orden en que aparecen, para trabajar la tarea:</text:span></text:span></text:p>
          <text:p text:style-name="P6"/>
          <text:p text:style-name="P6"><text:span text:style-name="Strong_20_Emphasis"><text:span text:style-name="T3">RA08_b) Se han realizado instalaciones desatendidas.</text:span></text:span></text:p>
          <text:p text:style-name="P7"> </text:p>
          <text:p text:style-name="P6"><text:span text:style-name="T3">Se quiere implementar el servicio de implementación de Windows (</text:span><text:span text:style-name="Strong_20_Emphasis"><text:span text:style-name="T3">WDS</text:span></text:span><text:span text:style-name="T3">) en el servidor de </text:span><text:span text:style-name="Strong_20_Emphasis"><text:span text:style-name="T3">XXX.loca</text:span></text:span><text:span text:style-name="T3">l.</text:span></text:p>
          <text:p text:style-name="P6"><text:span text:style-name="T3">Instale a través del asistente para agregar roles y características los roles necesarios para poder usar y configurar este servicio </text:span><text:span text:style-name="Strong_20_Emphasis"><text:span text:style-name="T3">WDS</text:span></text:span><text:span text:style-name="T3">.</text:span></text:p>
          <text:p text:style-name="P7"> </text:p>
          <text:p text:style-name="P4">Solamente será necesario (para esta tarea), completar la instalación desde el asistente para agregar roles y características. No es necesario configurar posteriormente nada más.</text:p>
          <text:p text:style-name="P6"><text:span text:style-name="T3">Además de mostrar los pasos de esta instalación, será imprescindible mostrar una </text:span><text:span text:style-name="Strong_20_Emphasis"><text:span text:style-name="T3">captura</text:span></text:span><text:span text:style-name="T3"> donde aparezca el mensaje de advertencia del administrador del servidor, en notificaciones, este mensaje de advertencia nos informa de que se requiere una configuración posterior a la implementación y en él aparecerá el nombre de nuestro servidor, indicando que se requiere configuración para el servidor DHCP.</text:span></text:p>
          <text:p text:style-name="P7"> </text:p>
          <text:p text:style-name="P6"><text:span text:style-name="Strong_20_Emphasis"><text:span text:style-name="T3">RA08_c) Se ha configurado y utilizado un servidor de actualizaciones.</text:span></text:span></text:p>
          <text:p text:style-name="P7"> </text:p>
          <text:p text:style-name="P6"><text:span text:style-name="T3">Se quiere implementar el servicio de actualizaciones de Windows (</text:span><text:span text:style-name="Strong_20_Emphasis"><text:span text:style-name="T3">WSUS</text:span></text:span><text:span text:style-name="T3">) en el servidor de </text:span><text:span text:style-name="Strong_20_Emphasis"><text:span text:style-name="T3">XXX.local</text:span></text:span><text:span text:style-name="T3">.</text:span></text:p>
          <text:p text:style-name="P6"><text:soft-page-break/><text:span text:style-name="T3">Instale a través del asistente para agregar roles y características los roles necesarios para poder usar y configurar este servicio </text:span><text:span text:style-name="Strong_20_Emphasis"><text:span text:style-name="T3">WSUS</text:span></text:span><text:span text:style-name="T3">.</text:span></text:p>
          <text:p text:style-name="P7"> </text:p>
          <text:p text:style-name="P4">Solamente será necesario (para esta tarea), completar la instalación desde el asistente para agregar roles y características. No es necesario configurar posteriormente nada más.</text:p>
          <text:p text:style-name="P7"> </text:p>
          <text:p text:style-name="P6"><text:span text:style-name="T3">Además de mostrar los pasos de esta instalación, será imprescindible mostrar una </text:span><text:span text:style-name="Strong_20_Emphasis"><text:span text:style-name="T3">captura</text:span></text:span><text:span text:style-name="T3"> donde aparezca en el panel del administrador del servidor, el servicio WSUS instalado, mostrando el nombre del servidor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5T06:21:33.027262900</meta:creation-date>
    <dc:date>2026-06-15T06:23:04.715965000</dc:date>
    <meta:editing-duration>PT45S</meta:editing-duration>
    <meta:editing-cycles>2</meta:editing-cycles>
    <meta:generator>LibreOffice/26.2.3.2$Windows_X86_64 LibreOffice_project/70e089b17412e4cb7773e41413306b17a2328c34</meta:generator>
    <meta:document-statistic meta:table-count="1" meta:image-count="0" meta:object-count="0" meta:page-count="2" meta:paragraph-count="28" meta:word-count="398" meta:character-count="2628" meta:non-whitespace-character-count="2240"/>
  </office:meta>
</office:document-meta>
</file>