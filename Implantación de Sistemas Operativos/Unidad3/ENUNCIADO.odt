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8.151cm" table:align="left"/>
    </style:style>
    <style:style style:name="Tabla1.A" style:family="table-column">
      <style:table-column-properties style:column-width="8.151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5.436cm" table:align="left"/>
    </style:style>
    <style:style style:name="Tabla3.A" style:family="table-column">
      <style:table-column-properties style:column-width="15.436cm"/>
    </style:style>
    <style:style style:name="Tabla3.A1" style:family="table-cell">
      <style:table-cell-properties style:vertical-align="middle" fo:background-color="#c3dcf7" fo:padding="0.049cm" fo:border="0.5pt solid #d4e0ee">
        <style:background-image/>
      </style:table-cell-properties>
    </style:style>
    <style:style style:name="Tabla4" style:family="table">
      <style:table-properties style:width="17cm" table:align="left"/>
    </style:style>
    <style:style style:name="Tabla4.A" style:family="table-column">
      <style:table-column-properties style:column-width="17cm"/>
    </style:style>
    <style:style style:name="Tabla4.A1"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8"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10"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fo:font-size="10p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style>
    <style:style style:name="T4" style:family="text">
      <style:text-properties style:font-name="HelveticaNeue-Light"/>
    </style:style>
    <style:style style:name="T5" style:family="text">
      <style:text-properties fo:color="#555555" loext:opacity="100%"/>
    </style:style>
    <style:style style:name="T6" style:family="text">
      <style:text-properties fo:color="#555555" loext:opacity="100%" style:font-name="HelveticaNeue-Light" style:font-name-asian="HelveticaNeue-Light" style:font-name-complex="HelveticaNeue-Light"/>
    </style:style>
    <style:style style:name="T7" style:family="text">
      <style:text-properties fo:color="#153152" loext:opacity="100%" style:font-name="HelveticaNeue-Light" fo:font-size="14pt" fo:font-weight="bold"/>
    </style:style>
    <style:style style:name="T8" style:family="text">
      <style:text-properties fo:color="#153152" loext:opacity="100%" style:font-name="HelveticaNeue-Light" fo:font-size="14pt" fo:font-weight="bold" style:font-name-asian="HelveticaNeue-Light" style:font-weight-asian="bold" style:font-name-complex="HelveticaNeue-Light"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
              </table:table-cell>
            </table:table-row>
          </table:table>
          <text:p text:style-name="P4">En esta tarea aprenderemos a trabajar con discos, particiones y algunas herramientas y conceptos relacionados con este contexto.</text:p>
          <text:p text:style-name="P4">Gestionaremos un disco duro de forma que crearemos particiones de distinto tipo al disco, asegurando el acceso a dichas particiones, usando las herramientas propuestas.<text:line-break/><text:line-break/>En Windows trabajaremos con la herramienta Administrador de discos de forma que podamos implementar un RAID.</text:p>
          <text:p text:style-name="P4">También se trabajará con un sistema operativo servidor y la herramienta de copias de seguridad, con el objetivo de salvaguardar datos del sistema.</text:p>
          <text:p text:style-name="P4">En cuestión de copias de seguridad y salvaguarda, existen otras herramientas externas, en esta tarea usaremos una de ellas para la creación de imágenes de copia de seguridad de un sistema.</text:p>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6"><text:span text:style-name="Strong_20_Emphasis"><text:span text:style-name="T3">RA03_e Se han utilizado herramientas de administración de discos para crear particiones, unidades lógicas, volúmenes simples y volúmenes distribuidos.</text:span></text:span></text:p>
                <text:p text:style-name="P7">Usaremos una máquina virtual con Ubuntu ya instalado.</text:p>
                <text:p text:style-name="P7">Con la máquina virtual apagada, añadir un nuevo disco de 15 GB a la máquina virtual.</text:p>
                <text:p text:style-name="P7"><text:line-break/>Una vez iniciada sesión en Ubuntu, se abrirá una terminal en Ubuntu y se realizarán los siguientes puntos:</text:p>
                <text:p text:style-name="P7"><text:line-break/>- Usando comandos de consola, crear en este nuevo disco de 15 GB, una partición primaria de 10 GB y dos unidades lógicas de 1GB cada una.</text:p>
                <text:p text:style-name="P7">- Formatear las particiones creadas a un sistema de ficheros con el que Linux pueda trabajar. No es obligatorio realizar esta operación con comandos, puede hacerlo con algún software o aplicación vista en el temario o en clases.</text:p>
                <text:p text:style-name="P6"><text:span text:style-name="T3">- Iniciar la máquina virtual con el software Gparted Live. Asignar una etiqueta a cada una de las particiones creadas anteriormente, para ello use la opción “etiqueta del sistema de archivos” de Gparted. Las particiones deben de etiquetarse como “</text:span><text:span text:style-name="Strong_20_Emphasis"><text:span text:style-name="T3">Pxxx</text:span></text:span><text:span text:style-name="T3">”, “</text:span><text:span text:style-name="Strong_20_Emphasis"><text:span text:style-name="T3">L1xxx</text:span></text:span><text:span text:style-name="T3">” y “</text:span><text:span text:style-name="Strong_20_Emphasis"><text:span text:style-name="T3">L2xxx</text:span></text:span><text:span text:style-name="T3">”, donde los caracteres “</text:span><text:span text:style-name="Strong_20_Emphasis"><text:span text:style-name="T3">xxx</text:span></text:span><text:span text:style-name="T3">” serán las </text:span><text:span text:style-name="Strong_20_Emphasis"><text:span text:style-name="T3">iniciales del alumno</text:span></text:span><text:span text:style-name="T3">. Muestre con una captura de pantalla cómo quedan las particiones (desde el software GParted).</text:span></text:p>
                <text:p text:style-name="P7"><text:line-break/>Incluir en el informe de la tarea las capturas y comentarios que se crean necesarios para demostrar que se han realizado estas acciones.</text:p>
                <text:p text:style-name="P8"> </text:p>
                <text:p text:style-name="P6"><text:span text:style-name="Strong_20_Emphasis"><text:span text:style-name="T3">RA03_g Se han implementado y automatizado planes de copias de seguridad.</text:span></text:span></text:p>
                <text:p text:style-name="P7">Se utilizará una máquina virtual con el sistema operativo Windows Server instalado.</text:p>
                <text:p text:style-name="P7">Se debe agregar a la máquina virtual los discos duros necesarios para poder realizar las siguientes acciones que se proponen.</text:p>
                <text:p text:style-name="P7"><text:line-break/>- Se usará un segundo disco duro en el sistema. El disco duro deberá tener una capacidad de 50 GB. Debe estar formateado para que el sistema Windows Server pueda usarlo como almacenamiento adicional para datos.</text:p>
                <text:p text:style-name="P7"><text:soft-page-break/>- Se instalará la característica Copias de Seguridad de Windows Server.</text:p>
                <text:p text:style-name="P7">- Debe de crear en el disco de 50 GB algunas carpetas y ficheros de texto que contenta alguna información, con unos 10 MB es suficiente.</text:p>
                <text:p text:style-name="P7">- Una vez creada la información en el disco de 50 GB, el Alumno deberá hacer una copia de seguridad manual del disco de 50 GB. (Esta acción se debe realizar con Copias de Seguridad de Windows Server).</text:p>
                <text:p text:style-name="P6"><text:span text:style-name="T3">- Usar el Disco local de sistema, el </text:span><text:span text:style-name="Strong_20_Emphasis"><text:span text:style-name="T3">disco C</text:span></text:span><text:span text:style-name="T3">:, de la máquina virtual, </text:span><text:span text:style-name="Strong_20_Emphasis"><text:span text:style-name="T3">como destino de la copia</text:span></text:span><text:span text:style-name="T3"> de seguridad.</text:span></text:p>
                <text:p text:style-name="P8"> <text:span text:style-name="T4">Nota: sólo deberá hacer una copia de seguridad del disco de 50 GB, nada más.</text:span></text:p>
                <text:p text:style-name="P8"> <text:span text:style-name="T4">- Una vez realizada la copia de seguridad, se debe de mostrar la información que se ha creado en el destino, la información que ha generado el backup.<text:line-break/><text:line-break/>Incluir en el informe de la tarea las capturas y comentarios que se crean necesarios para demostrar que se han realizado estas acciones.</text:span></text:p>
                <text:p text:style-name="P8"> </text:p>
                <text:p text:style-name="P6"><text:span text:style-name="Strong_20_Emphasis"><text:span text:style-name="T3">RA03_f Se han implantado sistemas de almacenamiento redundante (RAID).</text:span></text:span></text:p>
                <text:p text:style-name="P7">Se utilizará una máquina virtual con el sistema operativo Windows Server instalado. Puede usar la misma máquina virtual del apartado RA03_g.</text:p>
                <text:p text:style-name="P7">Se debe agregar a la máquina virtual los discos duros necesarios para poder realizar las siguientes acciones que se proponen.</text:p>
                <text:p text:style-name="P7">En el servidor con Windows Server, se nos propone implementar un RAID1 de forma que usando la herramienta Administrador de Discos de Windows Server se han de realizar las siguientes acciones:</text:p>
                <text:p text:style-name="P7"><text:line-break/>- Crear un RAID 1.</text:p>
                <text:p text:style-name="P6"><text:span text:style-name="T3">- Etiquetar el volumen creado como “</text:span><text:span text:style-name="Strong_20_Emphasis"><text:span text:style-name="T3">ESPEJO-XXX</text:span></text:span><text:span text:style-name="T3">”, donde </text:span><text:span text:style-name="Strong_20_Emphasis"><text:span text:style-name="T3">XXX</text:span></text:span><text:span text:style-name="T3"> serán las </text:span><text:span text:style-name="Strong_20_Emphasis"><text:span text:style-name="T3">iniciales del alumno</text:span></text:span><text:span text:style-name="T3">. Por ejemplo, en mi caso, el nombre del volumen será: ESPEJO-AMA (Antonio Moreno Aguilera)</text:span></text:p>
                <text:p text:style-name="P7">- Comprobar desde el explorador de Windows que está operativo copiando alguna información dentro del volumen que representa al RAID1.</text:p>
                <text:p text:style-name="P7">- Romper el RAID 1 y comprobar desde el explorador que la información no se ha perdido.<text:line-break/><text:line-break/>Incluir en el informe de la tarea las capturas y comentarios que se crean necesarios para demostrar que se han realizado estas acciones.</text:p>
                <text:p text:style-name="P6"><text:span text:style-name="Strong_20_Emphasis"><text:span text:style-name="T5"> </text:span></text:span></text:p>
                <text:p text:style-name="P6"><text:span text:style-name="Strong_20_Emphasis"><text:span text:style-name="T3">RA03_h Se han creado y recuperado imágenes de servidores.</text:span></text:span></text:p>
                <text:p text:style-name="P7">Se utilizará una máquina virtual con el sistema operativo Ubuntu instalado. Puede usar la misma máquina virtual del apartado RA03_e.</text:p>
                <text:p text:style-name="P7">Se debe agregar a la máquina virtual los discos duros necesarios para poder realizar las siguientes acciones que se proponen.</text:p>
                <text:p text:style-name="P7">Usaremos en este apartado el software Clonezilla live, para realizar una copia seguridad de la partición donde está instalado el sistema operativo Ubuntu.</text:p>
                <text:p text:style-name="P7"><text:line-break/>Se realizarán los siguientes puntos:</text:p>
                <text:p text:style-name="P6"><text:span text:style-name="T3"><text:line-break/>- Realizar con Clonezilla live una imagen de la partición donde está instalado Ubuntu (se trata de crear un imagen de la partición del sistema operativo, no es una clonación de una partición, ni una clonación de un disco duro). </text:span><text:span text:style-name="Strong_20_Emphasis"><text:span text:style-name="T3">El destino de la copia de seguridad será una partición primaria de un segundo disco duro debidamente formateado</text:span></text:span><text:span text:style-name="T3"> (el proceso de preparación del disco se puede realizar con cualquier aplicación de las que se ha visto en el temario, por ejemplo con la </text:span><text:span text:style-name="Strong_20_Emphasis"><text:span text:style-name="T3">aplicación DISCOS de Ubuntu</text:span></text:span><text:span text:style-name="T3">).</text:span></text:p>
                <text:p text:style-name="P7"><text:soft-page-break/>- Una vez finalizada la copia de seguridad, habrá que iniciar de nuevo el sistema operativo Ubuntu y mostrar la imagen generada y almacenada por Clonezilla live.</text:p>
                <text:p text:style-name="P7"><text:line-break/>Incluir en el informe de la tarea las capturas y comentarios que se crean necesarios para demostrar que se han realizado estas acciones.<text:line-break/><text:span text:style-name="T6"/></text:p>
              </table:table-cell>
            </table:table-row>
          </table:table>
          <text:p text:style-name="P9"/>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table-cell table:style-name="Tabla3.A1" office:value-type="string">
                <text:p text:style-name="P2"><text:span text:style-name="Strong_20_Emphasis"><text:span text:style-name="T7">CONSEJOS Y RECOMENDACIONES PARA REALIZAR LA TAREA</text:span></text:span><text:span text:style-name="T8"/></text:p>
              </table:table-cell>
            </table:table-row>
          </table:table>
          <table:table table:name="Tabla4" table:style-name="Tabla4">
            <table:table-column table:style-name="Tabla4.A"/>
            <table:table-row>
              <table:table-cell table:style-name="Tabla4.A1" office:value-type="string">
                <text:p text:style-name="P10">Para realizar esta tarea es aconsejable seguir los siguientes pasos:</text:p>
                <text:p text:style-name="P8"> </text:p>
                <text:p text:style-name="P7">Puede ser bastante útil para la realización del apartado RA03_e, consultar el epígrafe “gestión de sistemas de archivos mediante comandos y entornos gráficos” de la unidad, así como revisar los ejercicios resueltos “Descargar Gparted Live” y “Usar Gparted Live en una máquina virtual”. El vídeo concepto “Particiones MBR GPT” puede aclararle conceptos importantes sobre particiones.</text:p>
                <text:p text:style-name="P7">Para resolver el apartado RA03_g puede ser de gran ayuda revisar el ejercicio “copias de seguridad en Windows Server”.</text:p>
                <text:p text:style-name="P7">Para resolver el apartado RA03_f puede ser de gran ayuda revisar los ejercicios resueltos “Usar Administración de discos en Windows” y “Tipos de RAID”.</text:p>
                <text:p text:style-name="P7">Para la realización del apartado RA03_h consulte los ejercicios resueltos “Obtener Clonezilla”, “Uso de Clonezilla”, “Imagen de una partición con Clonezilla” y “Restaurar una copia de seguridad de Clonezilla” de la unidad.<text:span text:style-name="T6"/></text:p>
              </table:table-cell>
            </table:table-row>
          </table:table>
          <text:p text:style-name="P9"/>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6:18:07.697162200</meta:creation-date>
    <dc:date>2026-06-15T06:18:26.853814500</dc:date>
    <meta:editing-duration>PT19S</meta:editing-duration>
    <meta:editing-cycles>1</meta:editing-cycles>
    <meta:document-statistic meta:table-count="4" meta:image-count="0" meta:object-count="0" meta:page-count="3" meta:paragraph-count="53" meta:word-count="1127" meta:character-count="6953" meta:non-whitespace-character-count="5857"/>
    <meta:generator>LibreOffice/26.2.3.2$Windows_X86_64 LibreOffice_project/70e089b17412e4cb7773e41413306b17a2328c34</meta:generator>
  </office:meta>
</office:document-meta>
</file>