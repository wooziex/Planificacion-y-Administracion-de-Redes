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5.436cm" table:align="left"/>
    </style:style>
    <style:style style:name="Tabla3.A" style:family="table-column">
      <style:table-column-properties style:column-width="15.436cm"/>
    </style:style>
    <style:style style:name="Tabla3.A1" style:family="table-cell">
      <style:table-cell-properties style:vertical-align="middle" fo:background-color="#c3dcf7" fo:padding="0.049cm" fo:border="0.5pt solid #d4e0ee">
        <style:background-image/>
      </style:table-cell-properties>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5" style:family="paragraph" style:parent-style-name="Standard">
      <style:paragraph-properties fo:margin-left="0cm" fo:margin-right="0cm" fo:text-indent="0cm" style:auto-text-indent="false"/>
    </style:style>
    <style:style style:name="P6" style:family="paragraph" style:parent-style-name="Table_20_Contents">
      <style:paragraph-properties fo:margin-left="0cm" fo:margin-right="0cm" fo:margin-top="0cm" fo:margin-bottom="0cm" style:contextual-spacing="false" fo:text-indent="0cm" style:auto-text-indent="false"/>
    </style:style>
    <style:style style:name="P7"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loext:padding="0cm" loext:border="none"/>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555555" loext:opacity="100%" style:font-name="HelveticaNeue-Light"/>
    </style:style>
    <style:style style:name="T5" style:family="text">
      <style:text-properties fo:color="#0087ff" loext:opacity="100%" style:font-name="HelveticaNeue-Light" style:text-underline-style="solid" style:text-underline-width="auto" style:text-underline-color="font-color" loext:padding="0cm" loext:border="none"/>
    </style:style>
    <style:style style:name="T6" style:family="text">
      <style:text-properties style:font-name="HelveticaNeue-Light"/>
    </style:style>
    <style:style style:name="T7" style:family="text">
      <style:text-properties fo:color="#153152" loext:opacity="100%" style:font-name="HelveticaNeue-Light" fo:font-size="14pt" fo:font-weight="bold"/>
    </style:style>
    <style:style style:name="T8" style:family="text">
      <style:text-properties fo:color="#153152" loext:opacity="100%" style:font-name="HelveticaNeue-Light" fo:font-size="14pt" fo:font-weight="bold" style:font-name-asian="HelveticaNeue-Light" style:font-weight-asian="bold" style:font-name-complex="HelveticaNeue-Light"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En esta tarea aprenderemos a instalar sistemas operativos GNU/Linux y Microsoft, en concreto usaremos Ubuntu y Windows como sistemas operativos pertenecientes a estos dos grupos de sistemas operativos.<text:span text:style-name="T3"/></text:p>
              </table:table-cell>
            </table:table-row>
          </table:table>
          <text:p text:style-name="P4"/>
        </text:section>
      </text:section>
      <text:section text:style-name="Sect1" text:name="id25">
        <text:p text:style-name="P5"/>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3">En esta tarea se instalarán dos sistemas operativos. Antes de la instalación de cualquier sistema operativo hay que tener en cuenta los distintos elementos funcionales que componen nuestro sistema informático, es fundamental comprobar que se cumplen los requisitos de instalación de dicho sistema operativo.</text:p>
                <text:p text:style-name="P3">Habrá que consultar los requisitos de instalación del sistema operativo Ubuntu Desktop LTS y Windows 10 utilizando una fuente fiable.</text:p>
                <text:p text:style-name="P6"><text:span text:style-name="T4">Descargue Ubuntu (consulte con el profesor la versión a instalar). Descargue Windows 10 desde la </text:span><text:a xlink:type="simple" xlink:href="https://azureforeducation.microsoft.com/devtools" text:style-name="Internet_20_link" text:visited-style-name="Visited_20_Internet_20_Link"><text:span text:style-name="T5">plataforma de descargas</text:span></text:a><text:span text:style-name="T4"> de Microsoft.</text:span></text:p>
                <text:p text:style-name="P7"> </text:p>
                <text:p text:style-name="P3">Realice los siguientes apartados:</text:p>
                <text:p text:style-name="P7"> </text:p>
                <text:p text:style-name="P6"><text:span text:style-name="Strong_20_Emphasis"><text:span text:style-name="T4">RA1_d) Se han realizado instalaciones de diferentes sistemas operativos.</text:span></text:span></text:p>
                <text:p text:style-name="P3">En este apartado realizaremos la instalación de dos sistemas operativos:</text:p>
                <text:p text:style-name="P3">1.- Crear una máquina virtual con las características hardware que cumplan los requisitos mínimos necesarios para la instalación de Ubuntu Desktop LTS.</text:p>
                <text:p text:style-name="P7"> <text:span text:style-name="T6">Una vez creada la máquina virtual se deberá arrancar la máquina virtual con la imagen ISO de instalación del sistema operativo asociada al lector de CD/DVD virtual de dicha máquina virtual.</text:span></text:p>
                <text:p text:style-name="P3">Iniciar el proceso de instalación y configurar debidamente todos los pasos para la correcta instalación. Especial atención a la creación del usuario de instalación, debe cumplir los requisitos exigidos en el apartado "CRITERIOS DE CORRECCIÓN Y REQUISITOS MÍNIMOS ESPECÍFICOS". Se deberán mostrar capturas de pantalla de los pasos seguidos en este proceso de instalación.</text:p>
                <text:p text:style-name="P3">Una vez instalado y reiniciado el equipo, deberemos iniciar sesión de forma correcta con el usuario creado en la instalación.</text:p>
                <text:p text:style-name="P7"> </text:p>
                <text:p text:style-name="P3">2.- Crear una máquina virtual con las características hardware que cumplan los requisitos mínimos necesarios para la instalación de Windows 10. Consulte estos requisitos en la web de Microsoft.</text:p>
                <text:p text:style-name="P3">Una vez creada la máquina virtual se deberá arrancar la máquina virtual con la imagen ISO de instalación del sistema operativo Windows 10 asociada al lector de CD/DVD virtual de dicha máquina virtual.</text:p>
                <text:p text:style-name="P3">Iniciar el proceso de instalación y configurar debidamente todos los pasos para la correcta instalación. Especial atención a la creación del usuario de instalación, debe cumplir los requisitos exigidos en el apartado "CRITERIOS DE CORRECCIÓN Y REQUISITOS MÍNIMOS ESPECÍFICOS". Se deberán mostrar capturas de pantalla de los pasos seguidos en este proceso de instalación.</text:p>
                <text:p text:style-name="P3">Una vez instalado y reiniciado el equipo, deberemos iniciar sesión de forma correcta con el usuario creado en la instalación.</text:p>
                <text:p text:style-name="P7"> </text:p>
                <text:p text:style-name="P6"><text:soft-page-break/><text:span text:style-name="Strong_20_Emphasis"><text:span text:style-name="T4">RA1_e) Se han previsto y aplicado técnicas de actualización y recuperación del sistema.</text:span></text:span></text:p>
                <text:p text:style-name="P3">Una vez instalado y reiniciado el equipo con Ubuntu, deberemos actualizar la base de datos y los paquetes del gestor de paquetes APT, desde la línea de comandos.</text:p>
                <text:p text:style-name="P3">Deberá de utilizar los comandos necesarios para primero actualizar la lista de paquetes disponibles en los repositorios y posteriormente actualizar los paquetes instalados a versiones nuevas disponibles.</text:p>
                <text:p text:style-name="P7"> </text:p>
                <text:p text:style-name="P6"><text:span text:style-name="Strong_20_Emphasis"><text:span text:style-name="T4">RA1_f) Se han solucionado incidencias del sistema y del proceso de inicio.</text:span></text:span></text:p>
                <text:p text:style-name="P3">Es posible ejecutar el entorno de recuperación en el sistema operativo Windows 10 con la finalidad de solucionar problemas de inicio del sistema. Para esto habrá que acceder a las opciones de recuperación. Indique los pasos a seguir para llegar hasta estas opciones de recuperación y muestre una captura de pantalla en el informe de la tarea de dichas opciones.</text:p>
                <text:p text:style-name="P3">Una vez se encuentre en la pantalla de opciones de recuperación elija la opción “solucionar problemas” y posteriormente la opción “opciones avanzadas”. Dentro de opciones avanzadas elija entrar al símbolo de sistema, una vez acceda al símbolo de sistema, haga una captura de pantalla para mostrarlo en el informe de la tarea.</text:p>
                <text:p text:style-name="P7"> </text:p>
                <text:p text:style-name="P6"><text:span text:style-name="Strong_20_Emphasis"><text:span text:style-name="T4">RA1_g) Se han utilizado herramientas para conocer el software instalado en el sistema y su origen.</text:span></text:span></text:p>
                <text:p text:style-name="P3">Para la instalación y desinstalación de aplicaciones, los sistemas operativos ofrecen herramientas propias que ayudarán al usuario a organizar la lista de programas que necesiten para su trabajo en el sistema informático.</text:p>
                <text:p text:style-name="P3">En el sistema operativo Windows 10 acceda a la herramienta que permite ver la lista de programas instalados en el sistema operativo. Desde esta herramienta se pueden instalar y desinstalar programas. Muestre esto con una captura de pantalla.</text:p>
                <text:p text:style-name="P7"> </text:p>
                <text:p text:style-name="P6"><text:span text:style-name="Strong_20_Emphasis"><text:span text:style-name="T4">RA1_k) Se ha realizado la actualización y el mantenimiento de controladores de dispositivos.</text:span></text:span></text:p>
                <text:p text:style-name="P6"><text:span text:style-name="T4">Imagine que se necesita actualizar el controlador de vídeo del equipo con Windows. Incluya una captura de pantalla en donde se muestre que herramienta de Windows ha de usar para poder administrar los dispositivos del sistema operativo.<text:line-break/><text:line-break/><text:line-break/></text:span><text:span text:style-name="Strong_20_Emphasis"><text:span text:style-name="T4">Recuerde incluir las capturas de pantalla o imágenes necesarias en cada apartado del informe, para mostrar que se ha realizado lo que se pide.</text:span></text:span></text:p>
              </table:table-cell>
            </table:table-row>
          </table:table>
          <text:p text:style-name="P4"/>
        </text:section>
      </text:section>
      <text:section text:style-name="Sect1" text:name="id26">
        <text:p text:style-name="P5"/>
        <text:section text:style-name="Sect1" text:name="ta26_1">
          <text:p text:style-name="P1">¿Qué debes tener en cuenta para resolver la tarea?</text:p>
          <table:table table:name="Tabla3" table:style-name="Tabla3">
            <table:table-column table:style-name="Tabla3.A"/>
            <table:table-row>
              <table:table-cell table:style-name="Tabla3.A1" office:value-type="string">
                <text:p text:style-name="P2"><text:span text:style-name="Strong_20_Emphasis"><text:span text:style-name="T7">CONSEJOS Y RECOMENDACIONES PARA REALIZAR LA TAREA</text:span></text:span><text:span text:style-name="T8"/></text:p>
              </table:table-cell>
            </table:table-row>
          </table:table>
          <text:p text:style-name="P8">Para realizar esta tarea es aconsejable seguir los siguientes pasos:</text:p>
          <text:p text:style-name="P8">Para crear una o varias máquinas virtuales de forma correcta como se pide la tarea es conveniente visualizar primero la sesión publicada en el campus de FOC sobre manejo de máquinas virtuales y Virtual BOX.</text:p>
          <text:p text:style-name="P8">Una vez creada la máquina virtual, se deberá usar para la instalación una versión de Ubuntu desktop de las últimas disponibles en la Web oficial, para esto puede ser de mucha ayuda el ejercicio resuelto "Descargar Ubuntu para su instalación", así como la visualización de la sesión online de "Instalación de Ubuntu".</text:p>
          <text:p text:style-name="P8"><text:soft-page-break/>Para seguir los pasos adecuados en el proceso de instalación de los sistemas operativos, puede consultar la unidad 1 en su epígrafe 4 (donde se trata este tema), y también le ayudarán en esta parte de la tarea los video conceptos "Instalación de GNU/Linux" y "Instalación de Windows", así como la visualización de la sesiones online de "Instalación de Ubuntu" y "Instalación de Windows" y el ejercicio resuelto "Instalación de Windows 10".</text:p>
          <text:p text:style-name="P8">En la tarea, se pide actualizar el sistema operativo Ubuntu debidamente, para esto puede consultar el epígrafe 4.5 de la unidad 01, donde se nos habla del proceso de actualización de los sistemas operativos.</text:p>
          <text:p text:style-name="P8">Para realizar el apartado RA01_f sería de utilidad revisar el epígrafe 4.3 Recuperación del sistema.</text:p>
          <text:p text:style-name="P8">Para realizar el apartado RA01_g puede revisar el epígrafe 4.4. Instalación y desinstalación de aplicaciones. Requisitos, versiones y licencias.</text:p>
          <text:p text:style-name="P8">Para realizar el apartado RA01_k sería de utilidad revisar el epígrafe 4.8. Actualización y mantenimiento de controladores de dispositivos</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06:15:23.034168700</meta:creation-date>
    <dc:date>2026-06-15T06:15:52.334034100</dc:date>
    <meta:editing-duration>PT29S</meta:editing-duration>
    <meta:editing-cycles>1</meta:editing-cycles>
    <meta:document-statistic meta:table-count="3" meta:image-count="0" meta:object-count="0" meta:page-count="3" meta:paragraph-count="47" meta:word-count="1037" meta:character-count="6725" meta:non-whitespace-character-count="5718"/>
    <meta:generator>LibreOffice/26.2.3.2$Windows_X86_64 LibreOffice_project/70e089b17412e4cb7773e41413306b17a2328c34</meta:generator>
  </office:meta>
</office:document-meta>
</file>