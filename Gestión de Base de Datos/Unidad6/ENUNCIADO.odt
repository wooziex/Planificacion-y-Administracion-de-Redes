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Verdana, Helvetica, sans-serif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-left="1.588cm" fo:padding-right="0.049cm" fo:padding-top="0.049cm" fo:padding-bottom="0.049cm" fo:border="0.5pt solid #d4e0ee"/>
    </style:style>
    <style:style style:name="Tabla2.A3" style:family="table-cell">
      <style:table-cell-properties style:vertical-align="middle" fo:padding-left="1.588cm" fo:padding-right="0.049cm" fo:padding-top="0.049cm" fo:padding-bottom="0.049cm" fo:border="0.5pt solid #d4e0e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1" style:family="table-row">
      <style:table-row-properties fo:background-color="#fcfdfe">
        <style:background-image/>
      </style:table-row-properties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3.2" style:family="table-row">
      <style:table-row-properties fo:background-color="#c3dcf7">
        <style:background-image/>
      </style:table-row-properties>
    </style:style>
    <style:style style:name="Tabla3.A2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HelveticaNeue-Light" fo:font-size="12pt" fo:font-weight="normal"/>
    </style:style>
    <style:style style:name="P8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Arial2" fo:font-size="18pt" fo:font-weight="bold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9.75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Arial2" fo:font-size="9.75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 fo:font-size="10pt"/>
    </style:style>
    <style:style style:name="P13" style:family="paragraph" style:parent-style-name="Table_20_Contents" style:list-style-name="L2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4" style:family="paragraph" style:parent-style-name="Table_20_Contents" style:list-style-name="L3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Arial2" fo:font-size="9.75pt"/>
    </style:style>
    <style:style style:name="P15" style:family="paragraph" style:parent-style-name="Table_20_Contents" style:list-style-name="L4">
      <style:paragraph-properties fo:margin-left="0cm" fo:margin-right="0cm" fo:text-indent="0cm" style:auto-text-indent="false"/>
      <style:text-properties fo:color="#555555" loext:opacity="100%" style:font-name="Arial2" fo:font-size="9.75pt"/>
    </style:style>
    <style:style style:name="P16" style:family="paragraph" style:parent-style-name="Table_20_Contents" style:list-style-name="L4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Arial2" fo:font-size="9.75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Arial2" fo:font-size="9.75pt" style:font-name-asian="HelveticaNeue-Light" style:font-name-complex="HelveticaNeue-Ligh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.75pt"/>
    </style:style>
    <style:style style:name="P19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53152" loext:opacity="100%" style:font-name="Arial2" fo:font-size="18pt" fo:font-weight="bold"/>
    </style:style>
    <style:style style:name="P20" style:family="paragraph" style:parent-style-name="Table_20_Contents" style:list-style-name="L5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21" style:family="paragraph" style:parent-style-name="Table_20_Contents" style:list-style-name="L5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153152" loext:opacity="100%" style:font-name="HelveticaNeue-Light" fo:font-weight="bold" style:font-name-asian="HelveticaNeue-Light" style:font-weight-asian="bold" style:font-name-complex="HelveticaNeue-Light" style:font-weight-complex="bold"/>
    </style:style>
    <style:style style:name="T5" style:family="text">
      <style:text-properties style:font-name="Arial2" fo:font-size="9.75pt"/>
    </style:style>
    <style:style style:name="T6" style:family="text">
      <style:text-properties fo:color="#555555" loext:opacity="100%" style:font-name="HelveticaNeue-Light" fo:font-size="10pt"/>
    </style:style>
    <style:style style:name="T7" style:family="text">
      <style:text-properties fo:color="#555555" loext:opacity="100%" style:font-name="Arial2" fo:font-size="9.7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Durante las tareas anteriores, se llevó a cabo la creación de una base de datos y la explotacion de los datos. En esta nos centramos en seguridad y salvaguarda de estos datos.</text:p>
                <text:p text:style-name="P4"> </text:p>
                <text:p text:style-name="P3">Para realizar esta tarea es aconsejable revisar los contenidos de la Unidad 6.  <text:span text:style-name="T3"/></text:p>
              </table:table-cell>
            </table:table-row>
          </table:table>
          <text:p text:style-name="P5"/>
        </text:section>
      </text:section>
      <text:section text:style-name="Sect1" text:name="id25">
        <text:p text:style-name="P6"/>
        <text:section text:style-name="Sect1" text:name="ta25_1">
          <text:p text:style-name="P7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8">ENUNCIADO DE LA TAREA<text:span text:style-name="T4"/></text:p>
              </table:table-cell>
            </table:table-row>
            <table:table-row table:style-name="Tabla2.1">
              <table:table-cell table:style-name="Tabla2.A2" office:value-type="string">
                <text:p text:style-name="P9"/>
                <text:p text:style-name="P9"/>
                <text:p text:style-name="P3"><text:span text:style-name="T5">El objetivo principal de esta tarea es la realización de una copia en caliente de dos tablas y restaurarlas.</text:span> </text:p>
                <text:p text:style-name="P10">Para la realización de esta tarea, se deberá usar el esquema “HR” desde el SQL Developer.</text:p>
                <text:p text:style-name="P9"/>
                <text:p text:style-name="P9"/>
                <text:p text:style-name="P4"> </text:p>
                <text:p text:style-name="P11"><text:span text:style-name="Strong_20_Emphasis"><text:span text:style-name="T6">RA06_a Se han identificado herramientas gráficas y en línea de comandos para la administración de copias de seguridad.</text:span></text:span></text:p>
                <text:list text:style-name="L1">
                  <text:list-item>
                    <text:p text:style-name="P12">Indicar los tipos de export que se pueden realizar desde SQL Developer. </text:p>
                  </text:list-item>
                </text:list>
                <text:p text:style-name="P11"><text:span text:style-name="Strong_20_Emphasis"><text:span text:style-name="T7">RA06_d Se han identificado las herramientas para importar y exportar datos.</text:span></text:span></text:p>
                <text:list text:style-name="L2">
                  <text:list-item>
                    <text:p text:style-name="P13">Indicar la instruccion que usarias para impotar y exportar una tabla de Oracle. </text:p>
                  </text:list-item>
                </text:list>
                <text:p text:style-name="P11"><text:span text:style-name="Strong_20_Emphasis"><text:span text:style-name="T7">RA06_e - Se han exportado datos a diversos formatos. </text:span></text:span></text:p>
                <text:list text:style-name="L3">
                  <text:list-item>
                    <text:p text:style-name="P14">Exportar las tablas EMPLOYEES y DEPARTEMNTS del esquema HR. generando asi un backup lógico. de ambas tablas.</text:p>
                  </text:list-item>
                </text:list>
                <text:p text:style-name="P4"> </text:p>
                <text:p text:style-name="P11"><text:span text:style-name="Strong_20_Emphasis"><text:span text:style-name="T7">RA06_f - Se han importado datos con distintos formatos. </text:span></text:span></text:p>
                <text:list text:style-name="L4">
                  <text:list-item>
                    <text:p text:style-name="P15">Importar las tablas en la base de datos con un nombre diferente EMPLOYEES_REST y DEPARTEMENT_REST.</text:p>
                  </text:list-item>
                  <text:list-item>
                    <text:p text:style-name="P16">Comprobar que las tablas restauradas contiene la misma información que las tablas origen.  </text:p>
                  </text:list-item>
                </text:list>
                <text:p text:style-name="P4">  <text:span text:style-name="T3"/></text:p>
              </table:table-cell>
            </table:table-row>
            <table:table-row table:style-name="Tabla2.1">
              <table:table-cell table:style-name="Tabla2.A3" office:value-type="string">
                <text:p text:style-name="P17"/>
              </table:table-cell>
            </table:table-row>
          </table:table>
          <text:p text:style-name="P5"/>
        </text:section>
      </text:section>
      <text:section text:style-name="Sect1" text:name="id26">
        <text:p text:style-name="P6"/>
        <text:section text:style-name="Sect1" text:name="ta26_1">
          <text:p text:style-name="P18">¿Qué debes tener en cuenta para resolver la tarea?</text:p>
          <table:table table:name="Tabla3" table:style-name="Tabla3">
            <table:table-column table:style-name="Tabla3.A"/>
            <table:table-row table:style-name="Tabla3.1">
              <table:table-cell table:style-name="Tabla3.A1" office:value-type="string">
                <text:p text:style-name="P19">CONSEJOS Y RECOMENDACIONES PARA REALIZAR LA TAREA.<text:span text:style-name="T4"/></text:p>
              </table:table-cell>
            </table:table-row>
            <table:table-row table:style-name="Tabla3.2">
              <table:table-cell table:style-name="Tabla3.A2" office:value-type="string">
                <text:p text:style-name="P4"> </text:p>
                <text:p text:style-name="P9"/>
                <text:p text:style-name="P10">Para realizar esta tarea tener en cuenta las siguientes recomendaciones:</text:p>
                <text:p text:style-name="P10">Repasar los siguientes puntos del temario.</text:p>
                <text:p text:style-name="P9"/>
                <text:p text:style-name="P3">Para realizar esta tarea es aconsejable revisar los siguientes contenidos de la Unidad 6:</text:p>
                <text:list text:style-name="L5">
                  <text:list-item>
                    <text:p text:style-name="P20"><text:soft-page-break/>Exportación e importación de datos. Conceptos.</text:p>
                  </text:list-item>
                  <text:list-item>
                    <text:p text:style-name="P20">Abrir el SQL Developer.</text:p>
                  </text:list-item>
                  <text:list-item>
                    <text:p text:style-name="P20">Conectar con el usuario HR.</text:p>
                  </text:list-item>
                  <text:list-item>
                    <text:p text:style-name="P20">Acceder a tablas.</text:p>
                  </text:list-item>
                  <text:list-item>
                    <text:p text:style-name="P20">Boton derecho y opcion de exportar datos. </text:p>
                  </text:list-item>
                  <text:list-item>
                    <text:p text:style-name="P21">Una vez exportado, pulsar en Importar los datos. <text:span text:style-name="T3"/></text:p>
                  </text:list-item>
                </text:list>
              </table:table-cell>
            </table:table-row>
          </table:table>
          <text:p text:style-name="P5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Verdana, Helvetica, sans-serif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0:32:24.557462100</meta:creation-date>
    <dc:date>2026-06-15T10:32:49.004401600</dc:date>
    <meta:editing-duration>PT24S</meta:editing-duration>
    <meta:editing-cycles>1</meta:editing-cycles>
    <meta:document-statistic meta:table-count="3" meta:image-count="0" meta:object-count="0" meta:page-count="2" meta:paragraph-count="33" meta:word-count="302" meta:character-count="1810" meta:non-whitespace-character-count="1530"/>
    <meta:generator>LibreOffice/26.2.3.2$Windows_X86_64 LibreOffice_project/70e089b17412e4cb7773e41413306b17a2328c34</meta:generator>
  </office:meta>
</office:document-meta>
</file>