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Verdana, Helvetica,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left="1.588cm" fo:padding-right="0.049cm" fo:padding-top="0.049cm" fo:padding-bottom="0.049cm" fo:border="0.5pt solid #d4e0ee"/>
    </style:style>
    <style:style style:name="Tabla2.A3" style:family="table-cell">
      <style:table-cell-properties style:vertical-align="middle" fo:padding-left="1.588cm" fo:padding-right="0.049cm" fo:padding-top="0.049cm" fo:padding-bottom="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HelveticaNeue-Light" fo:font-size="12pt" fo:font-weight="normal"/>
    </style:style>
    <style:style style:name="P8"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color="#000000" loext:opacity="100%" style:font-name="Arial2" fo:font-size="18pt" fo:font-weight="bold"/>
    </style:style>
    <style:style style:name="P9" style:family="paragraph" style:parent-style-name="Table_20_Contents">
      <style:paragraph-properties fo:margin-left="0cm" fo:margin-right="0cm" fo:margin-top="0cm" fo:margin-bottom="0cm" style:contextual-spacing="false" fo:text-indent="0cm" style:auto-text-indent="false"/>
      <style:text-properties style:font-name="Arial2" fo:font-size="9.75pt"/>
    </style:style>
    <style:style style:name="P10"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Arial2" fo:font-size="9.75pt"/>
    </style:style>
    <style:style style:name="P11" style:family="paragraph" style:parent-style-name="Table_20_Contents">
      <loext:graphic-properties draw:fill="bitmap" style:repeat="repeat" draw:fill-image-ref-point="top-left"/>
      <style:paragraph-properties fo:margin-left="1.058cm" fo:margin-right="0cm" fo:margin-top="0cm" fo:margin-bottom="0cm" style:contextual-spacing="false" style:line-height-at-least="0.529cm" fo:text-indent="0cm" style:auto-text-indent="false" fo:padding-left="0.049cm" fo:padding-right="0cm" fo:padding-top="0cm" fo:padding-bottom="0.049cm" fo:border-left="0.06pt solid #cccccc" fo:border-right="none" fo:border-top="none" fo:border-bottom="0.06pt solid #cccccc">
        <style:background-image/>
      </style:paragraph-properties>
      <style:text-properties fo:color="#0f243e" loext:opacity="100%" style:font-name="Arial2" fo:font-size="9.75pt" fo:letter-spacing="-0.004cm"/>
    </style:style>
    <style:style style:name="P12" style:family="paragraph" style:parent-style-name="Table_20_Contents">
      <style:paragraph-properties fo:margin-left="0cm" fo:margin-right="0cm" fo:margin-top="0cm" fo:margin-bottom="0cm" style:contextual-spacing="false" fo:text-indent="0cm" style:auto-text-indent="false"/>
    </style:style>
    <style:style style:name="P13"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Arial2" fo:font-size="9.75pt"/>
    </style:style>
    <style:style style:name="P14" style:family="paragraph" style:parent-style-name="Table_20_Contents" style:list-style-name="L2">
      <style:paragraph-properties fo:margin-left="0cm" fo:margin-right="0cm" fo:text-indent="0cm" style:auto-text-indent="false"/>
      <style:text-properties fo:color="#555555" loext:opacity="100%" style:font-name="Arial2" fo:font-size="9.75pt"/>
    </style:style>
    <style:style style:name="P15" style:family="paragraph" style:parent-style-name="Table_20_Contents" style:list-style-name="L2">
      <style:paragraph-properties fo:margin-left="0cm" fo:margin-right="0cm" fo:margin-top="0cm" fo:margin-bottom="0.499cm" style:contextual-spacing="false" fo:text-indent="0cm" style:auto-text-indent="false"/>
      <style:text-properties fo:color="#555555" loext:opacity="100%" style:font-name="Arial2" fo:font-size="9.75pt"/>
    </style:style>
    <style:style style:name="P16" style:family="paragraph" style:parent-style-name="Table_20_Contents" style:list-style-name="L3">
      <style:paragraph-properties fo:margin-left="0cm" fo:margin-right="0cm" fo:text-indent="0cm" style:auto-text-indent="false"/>
      <style:text-properties fo:color="#555555" loext:opacity="100%" style:font-name="Arial2" fo:font-size="9.75pt"/>
    </style:style>
    <style:style style:name="P17" style:family="paragraph" style:parent-style-name="Table_20_Contents" style:list-style-name="L3">
      <style:paragraph-properties fo:margin-left="0cm" fo:margin-right="0cm" fo:margin-top="0cm" fo:margin-bottom="0.499cm" style:contextual-spacing="false" fo:text-indent="0cm" style:auto-text-indent="false"/>
      <style:text-properties fo:color="#555555" loext:opacity="100%" style:font-name="Arial2" fo:font-size="9.75pt"/>
    </style:style>
    <style:style style:name="P18" style:family="paragraph" style:parent-style-name="Table_20_Contents" style:list-style-name="L4">
      <style:paragraph-properties fo:margin-left="0cm" fo:margin-right="0cm" fo:text-indent="0cm" style:auto-text-indent="false"/>
      <style:text-properties fo:color="#555555" loext:opacity="100%" style:font-name="Arial2" fo:font-size="9.75pt"/>
    </style:style>
    <style:style style:name="P19" style:family="paragraph" style:parent-style-name="Table_20_Contents" style:list-style-name="L4">
      <style:paragraph-properties fo:margin-left="0cm" fo:margin-right="0cm" fo:margin-top="0cm" fo:margin-bottom="0.499cm" style:contextual-spacing="false" fo:text-indent="0cm" style:auto-text-indent="false"/>
      <style:text-properties fo:color="#555555" loext:opacity="100%" style:font-name="Arial2" fo:font-size="9.75pt"/>
    </style:style>
    <style:style style:name="P20" style:family="paragraph" style:parent-style-name="Table_20_Contents" style:list-style-name="L5">
      <style:paragraph-properties fo:margin-left="0cm" fo:margin-right="0cm" fo:margin-top="0cm" fo:margin-bottom="0.499cm" style:contextual-spacing="false" fo:text-indent="0cm" style:auto-text-indent="false"/>
      <style:text-properties fo:color="#555555" loext:opacity="100%" style:font-name="Arial2" fo:font-size="9.75pt"/>
    </style:style>
    <style:style style:name="P21" style:family="paragraph" style:parent-style-name="Table_20_Contents" style:list-style-name="L6">
      <style:paragraph-properties fo:margin-left="0cm" fo:margin-right="0cm" fo:margin-top="0cm" fo:margin-bottom="0.499cm" style:contextual-spacing="false" fo:text-indent="0cm" style:auto-text-indent="false"/>
      <style:text-properties fo:color="#555555" loext:opacity="100%" style:font-name="HelveticaNeue-Light"/>
    </style:style>
    <style:style style:name="P22" style:family="paragraph" style:parent-style-name="Table_20_Contents" style:list-style-name="L7">
      <style:paragraph-properties fo:margin-left="0cm" fo:margin-right="0cm" fo:margin-top="0cm" fo:margin-bottom="0.499cm" style:contextual-spacing="false" fo:text-indent="0cm" style:auto-text-indent="false"/>
      <style:text-properties fo:color="#555555" loext:opacity="100%" style:font-name="Arial2" fo:font-size="9.75pt"/>
    </style:style>
    <style:style style:name="P2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Arial2" fo:font-size="9.75pt" style:font-name-asian="HelveticaNeue-Light" style:font-name-complex="HelveticaNeue-Light"/>
    </style:style>
    <style:style style:name="P24"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ize="9.75pt"/>
    </style:style>
    <style:style style:name="P25"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color="#153152" loext:opacity="100%" style:font-name="Arial2" fo:font-size="18pt" fo:font-weight="bold"/>
    </style:style>
    <style:style style:name="P26" style:family="paragraph" style:parent-style-name="Table_20_Contents" style:list-style-name="L8">
      <style:paragraph-properties fo:margin-left="0cm" fo:margin-right="0cm" fo:text-indent="0cm" style:auto-text-indent="false"/>
      <style:text-properties fo:color="#555555" loext:opacity="100%" style:font-name="HelveticaNeue-Light"/>
    </style:style>
    <style:style style:name="P27" style:family="paragraph" style:parent-style-name="Table_20_Contents" style:list-style-name="L8">
      <style:paragraph-properties fo:margin-left="0cm" fo:margin-right="0cm" fo:margin-top="0cm" fo:margin-bottom="0.499cm" style:contextual-spacing="false" fo:text-indent="0cm" style:auto-text-indent="false"/>
      <style:text-properties fo:color="#555555" loext:opacity="100%" style:font-name="HelveticaNeue-Ligh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153152" loext:opacity="100%" style:font-name="HelveticaNeue-Light" fo:font-weight="bold" style:font-name-asian="HelveticaNeue-Light" style:font-weight-asian="bold" style:font-name-complex="HelveticaNeue-Light" style:font-weight-complex="bold"/>
    </style:style>
    <style:style style:name="T5" style:family="text">
      <style:text-properties fo:color="#555555" loext:opacity="100%" style:font-name="Arial2" fo:font-size="9.75pt"/>
    </style:style>
    <style:style style:name="T6" style:family="text">
      <style:text-properties fo:color="#555555" loext:opacity="100%" style:font-name="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Durante las tareas anteriores, se llevó a cabo la creación de una base de datos, en la presente tarea se va a dar el siguiente paso y se va a aprender a insertar, modificar y borrar datos, asi como explotar de forma avanzada la información.</text:p>
                <text:p text:style-name="P3">.</text:p>
                <text:p text:style-name="P4"> </text:p>
                <text:p text:style-name="P3">Para realizar esta tarea es aconsejable revisar los contenidos de la Unidad 6.<text:span text:style-name="T3"/></text:p>
              </table:table-cell>
            </table:table-row>
          </table:table>
          <text:p text:style-name="P5"/>
        </text:section>
      </text:section>
      <text:section text:style-name="Sect1" text:name="id25">
        <text:p text:style-name="P6"/>
        <text:section text:style-name="Sect1" text:name="ta25_1">
          <text:p text:style-name="P7">¿Qué debes hacer?</text:p>
          <table:table table:name="Tabla2" table:style-name="Tabla2">
            <table:table-column table:style-name="Tabla2.A"/>
            <table:table-row table:style-name="Tabla2.1">
              <table:table-cell table:style-name="Tabla2.A1" office:value-type="string">
                <text:p text:style-name="P8">ENUNCIADO DE LA TAREA<text:span text:style-name="T4"/></text:p>
              </table:table-cell>
            </table:table-row>
            <table:table-row table:style-name="Tabla2.1">
              <table:table-cell table:style-name="Tabla2.A2" office:value-type="string">
                <text:p text:style-name="P9"/>
                <text:p text:style-name="P9"/>
                <text:p text:style-name="P10">El objetivo principal de esta tarea es la realización de consultas SQL de la base de datos.</text:p>
                <text:p text:style-name="P4"> </text:p>
                <text:p text:style-name="P10">Para la realización de esta tarea, se deberá usar el esquema “HR” con el que se viene trabajando a lo largo del curso.</text:p>
                <text:p text:style-name="P10"><text:line-break/>Si todavía no habéis conectado al esquema HR, será necesario establecer una contraseña valida, para ello realizar los siguientes pasos</text:p>
                <text:p text:style-name="P4"> </text:p>
                <text:p text:style-name="P10">Con SQL PLUS (desde un cmd)</text:p>
                <text:p text:style-name="P4"> </text:p>
                <text:p text:style-name="P11">Connect sys/oracle AS sysdba;</text:p>
                <text:p text:style-name="P10">alter user HR identified by HR;</text:p>
                <text:p text:style-name="P4"> </text:p>
                <text:p text:style-name="P10">Con esto restablecemos la contraseña del usuario HR con HR.</text:p>
                <text:p text:style-name="P4"> </text:p>
                <text:p text:style-name="P10">Nota: Esta forma de conexión, ha sido utilizada con las credenciales de la máquina virtual, en caso de haber instalado Oracle 11g en cualquier otra máquina se deben seguir los mismos pasos con las credenciales asignadas al administrador en el momento de la instalación.</text:p>
                <text:p text:style-name="P4"> </text:p>
                <text:p text:style-name="P10">Se pide realizar las siguientes consultas con el asesior de consultas del SQL Deveoper:</text:p>
                <text:p text:style-name="P4"> </text:p>
                <text:p text:style-name="P12"><text:span text:style-name="Strong_20_Emphasis"><text:span text:style-name="T5">RA05_a Se han identificado las herramientas y sentencias para modificar el contenido de la base de datos</text:span></text:span></text:p>
                <text:list text:style-name="L1">
                  <text:list-item>
                    <text:p text:style-name="P13">Indicar las sentencias que usarias para modificar, insertar y eliminar un registro.</text:p>
                  </text:list-item>
                </text:list>
                <text:p text:style-name="P12"><text:span text:style-name="Strong_20_Emphasis"><text:span text:style-name="T5">RA05_b Se han insertado, borrado y actualizado datos en las tablas. </text:span></text:span></text:p>
                <text:p text:style-name="P10">Inserción:</text:p>
                <text:list text:style-name="L2">
                  <text:list-item>
                    <text:p text:style-name="P14">Inserte un employee llamado Pedro Martos con salario de 7000 en el departamento 120 y el resto de los datos a tu elección.</text:p>
                  </text:list-item>
                  <text:list-item>
                    <text:p text:style-name="P14">Inserte un employee llamado Alberto Garcia con salario de 23000 en el departamento 100 y el resto de los datos a tu elección.</text:p>
                  </text:list-item>
                  <text:list-item>
                    <text:p text:style-name="P15">Consulta los datos de employee para ver que se han introducido correctamente.</text:p>
                  </text:list-item>
                </text:list>
                <text:p text:style-name="P4"> </text:p>
                <text:p text:style-name="P4"> </text:p>
                <text:p text:style-name="P10">Modificación:</text:p>
                <text:list text:style-name="L3">
                  <text:list-item>
                    <text:p text:style-name="P16">Modifique el salario de los empleados aumentado su salario en 200.</text:p>
                  </text:list-item>
                  <text:list-item>
                    <text:p text:style-name="P16">La empresa ha decidido subir el salario a todos los empleados en un 10%. Realice la modificación para que dicha subida sea efectiva.</text:p>
                  </text:list-item>
                  <text:list-item>
                    <text:p text:style-name="P17"><text:soft-page-break/>Consulta los datos de empleados para ver que se han modificado correctamente.</text:p>
                  </text:list-item>
                </text:list>
                <text:p text:style-name="P4"> </text:p>
                <text:p text:style-name="P10">Eliminación:</text:p>
                <text:list text:style-name="L4">
                  <text:list-item>
                    <text:p text:style-name="P18">Elimine el empleado de nombre Pedro Martos</text:p>
                  </text:list-item>
                  <text:list-item>
                    <text:p text:style-name="P18">Elimine todos los empleados que no tenga departamento asociado.</text:p>
                  </text:list-item>
                  <text:list-item>
                    <text:p text:style-name="P19">Consulta los datos de empleados para ver que se han eliminado correctamente.</text:p>
                  </text:list-item>
                </text:list>
                <text:p text:style-name="P4"> </text:p>
                <text:p text:style-name="P4"> </text:p>
                <text:p text:style-name="P12"><text:span text:style-name="Strong_20_Emphasis"><text:span text:style-name="T5">RA05_c Se ha incluido en una tabla la información resultante de la ejecución de una consulta. </text:span></text:span></text:p>
                <text:list text:style-name="L5">
                  <text:list-item>
                    <text:p text:style-name="P20">crear una tabla llamada employee_2, con los mismos campos que employees, a continuacion insertar los registros que tiene la tabla employee mediante un insert... select.</text:p>
                  </text:list-item>
                </text:list>
                <text:p text:style-name="P4"> </text:p>
                <text:p text:style-name="P12"><text:span text:style-name="Strong_20_Emphasis"><text:span text:style-name="T6">RA05_d Se han adoptado medidas para mantener la integridad y consistencia de la información.</text:span></text:span></text:p>
                <text:list text:style-name="L6">
                  <text:list-item>
                    <text:p text:style-name="P21">haga una insercion en una tabla y deshaga los cambios.</text:p>
                  </text:list-item>
                </text:list>
                <text:p text:style-name="P12"><text:span text:style-name="Strong_20_Emphasis"><text:span text:style-name="T5">RA05_e Se han diseñado guiones de sentencias para llevar a cabo tareas complejas.</text:span></text:span></text:p>
                <text:list text:style-name="L7">
                  <text:list-item>
                    <text:p text:style-name="P22">Desarrollar un bloque anomimo que meidante una varialbe de sustitucion solicite un employee_id y en la tabla employees obtenga su salario y lo escribar por pantalla.  </text:p>
                  </text:list-item>
                </text:list>
                <text:p text:style-name="P4"> <text:span text:style-name="T3"/></text:p>
              </table:table-cell>
            </table:table-row>
            <table:table-row table:style-name="Tabla2.1">
              <table:table-cell table:style-name="Tabla2.A3" office:value-type="string">
                <text:p text:style-name="P23"/>
              </table:table-cell>
            </table:table-row>
          </table:table>
          <text:p text:style-name="P5"/>
        </text:section>
      </text:section>
      <text:section text:style-name="Sect1" text:name="id26">
        <text:p text:style-name="P6"/>
        <text:section text:style-name="Sect1" text:name="ta26_1">
          <text:p text:style-name="P24">¿Qué debes tener en cuenta para resolver la tarea?</text:p>
          <table:table table:name="Tabla3" table:style-name="Tabla3">
            <table:table-column table:style-name="Tabla3.A"/>
            <table:table-row table:style-name="Tabla3.1">
              <table:table-cell table:style-name="Tabla3.A1" office:value-type="string">
                <text:p text:style-name="P25">CONSEJOS Y RECOMENDACIONES PARA REALIZAR LA TAREA.<text:span text:style-name="T4"/></text:p>
              </table:table-cell>
            </table:table-row>
            <table:table-row table:style-name="Tabla3.1">
              <table:table-cell table:style-name="Tabla3.A2" office:value-type="string">
                <text:p text:style-name="P4"> </text:p>
                <text:p text:style-name="P9"/>
                <text:p text:style-name="P10">Para realizar esta tarea tener en cuenta las siguientes recomendaciones:</text:p>
                <text:p text:style-name="P10">Repasar los siguientes puntos del temario.</text:p>
                <text:p text:style-name="P9"/>
                <text:p text:style-name="P3">Para realizar esta tarea es aconsejable revisar los siguientes contenidos de la Unidad 6:</text:p>
                <text:list text:style-name="L8">
                  <text:list-item>
                    <text:p text:style-name="P26">4. Sentencias para modificar el contenido de la base de datos.</text:p>
                  </text:list-item>
                  <text:list-item>
                    <text:p text:style-name="P26">4.1 INSERT</text:p>
                  </text:list-item>
                  <text:list-item>
                    <text:p text:style-name="P26">4.1.1 INSERT sobre todas las columnas de la tabla</text:p>
                  </text:list-item>
                  <text:list-item>
                    <text:p text:style-name="P26">4.1.2 INSERT de filas con valores nulos</text:p>
                  </text:list-item>
                  <text:list-item>
                    <text:p text:style-name="P26">4.1.3 INSERT de valores especiales</text:p>
                  </text:list-item>
                  <text:list-item>
                    <text:p text:style-name="P26">4.1.4 INSERT de valores de fecha y hora específicos</text:p>
                  </text:list-item>
                  <text:list-item>
                    <text:p text:style-name="P26">4.2 DELETE 4.2.1 DELETE de todas las filas de la tabla</text:p>
                  </text:list-item>
                  <text:list-item>
                    <text:p text:style-name="P26">4.2.2 DELETE de filas concretas 4.3 UPDATE</text:p>
                  </text:list-item>
                  <text:list-item>
                    <text:p text:style-name="P26">4.3.1 UPDATE de todas las filas de una tabla</text:p>
                  </text:list-item>
                  <text:list-item>
                    <text:p text:style-name="P26">4.3.2 UPDATE filas específicas de una tabla</text:p>
                  </text:list-item>
                  <text:list-item>
                    <text:p text:style-name="P27">4.3.3 UPDATE con valores nulos<text:span text:style-name="T3"/></text:p>
                  </text:list-item>
                </text:list>
              </table:table-cell>
            </table:table-row>
          </table:table>
          <text:p text:style-name="P5"/>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Verdana, Helvetica, sans-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31:32.292217200</meta:creation-date>
    <dc:date>2026-06-15T10:31:53.912451200</dc:date>
    <meta:editing-duration>PT21S</meta:editing-duration>
    <meta:editing-cycles>1</meta:editing-cycles>
    <meta:document-statistic meta:table-count="3" meta:image-count="0" meta:object-count="0" meta:page-count="2" meta:paragraph-count="69" meta:word-count="649" meta:character-count="3774" meta:non-whitespace-character-count="3181"/>
    <meta:generator>LibreOffice/26.2.3.2$Windows_X86_64 LibreOffice_project/70e089b17412e4cb7773e41413306b17a2328c34</meta:generator>
  </office:meta>
</office:document-meta>
</file>