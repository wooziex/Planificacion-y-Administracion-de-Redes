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Verdana, Helvetica, sans-serif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1" style:family="table-row">
      <style:table-row-properties fo:background-color="#fcfdfe">
        <style:background-image/>
      </style:table-row-properties>
    </style:style>
    <style:style style:name="Tabla1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1.A2" style:family="table-cell">
      <style:table-cell-properties style:vertical-align="middle" fo:padding="0.049cm" fo:border="0.5pt solid #d4e0e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7cm"/>
    </style:style>
    <style:style style:name="Tabla2.1" style:family="table-row">
      <style:table-row-properties fo:background-color="#fcfdfe">
        <style:background-image/>
      </style:table-row-properties>
    </style:style>
    <style:style style:name="Tabla2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2.A2" style:family="table-cell">
      <style:table-cell-properties style:vertical-align="middle" fo:padding="0.049cm" fo:border="0.5pt solid #d4e0ee"/>
    </style:style>
    <style:style style:name="Tabla2.A3" style:family="table-cell">
      <style:table-cell-properties style:vertical-align="middle" fo:padding="0.049cm" fo:border="0.5pt solid #d4e0e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7cm"/>
    </style:style>
    <style:style style:name="Tabla3.1" style:family="table-row">
      <style:table-row-properties fo:background-color="#fcfdfe">
        <style:background-image/>
      </style:table-row-properties>
    </style:style>
    <style:style style:name="Tabla3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3.2" style:family="table-row">
      <style:table-row-properties fo:background-color="#c3dcf7">
        <style:background-image/>
      </style:table-row-properties>
    </style:style>
    <style:style style:name="Tabla3.A2" style:family="table-cell">
      <style:table-cell-properties style:vertical-align="middle" fo:padding="0.049cm" fo:border="0.5pt solid #d4e0ee"/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HelveticaNeue-Ligh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style:font-name-asian="HelveticaNeue-Light" style:font-size-asian="12pt" style:font-style-asian="normal" style:font-weight-asian="normal" style:font-name-complex="HelveticaNeue-Light" style:font-size-complex="12pt" style:font-style-complex="normal" style:font-weight-complex="normal" loext:padding="0cm" loext:border="non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153152" loext:opacity="100%" style:font-name="Arial2" fo:font-size="18pt" fo:font-weight="bold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Arial2" fo:font-size="9.75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/>
    </style:style>
    <style:style style:name="P9" style:family="paragraph" style:parent-style-name="Table_20_Contents" style:list-style-name="L1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able_20_Contents" style:list-style-name="L2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2" style:family="paragraph" style:parent-style-name="Table_20_Contents" style:list-style-name="L3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3" style:family="paragraph" style:parent-style-name="Table_20_Contents" style:list-style-name="L4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5" style:family="paragraph" style:parent-style-name="Table_20_Contents" style:list-style-name="L5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6" style:family="paragraph" style:parent-style-name="Table_20_Contents" style:list-style-name="L5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T1" style:family="text">
      <style:text-properties fo:color="#153152" loext:opacity="100%" style:font-name="HelveticaNeue-Light" fo:font-size="18pt" fo:font-weight="bold"/>
    </style:style>
    <style:style style:name="T2" style:family="text">
      <style:text-properties fo:color="#153152" loext:opacity="100%" style:font-name="HelveticaNeue-Light" fo:font-size="18pt" fo:font-weight="bold" style:font-name-asian="HelveticaNeue-Light" style:font-weight-asian="bold" style:font-name-complex="HelveticaNeue-Light" style:font-weight-complex="bold"/>
    </style:style>
    <style:style style:name="T3" style:family="text">
      <style:text-properties fo:color="#555555" loext:opacity="100%" style:font-name="HelveticaNeue-Light" style:font-name-asian="HelveticaNeue-Light" style:font-name-complex="HelveticaNeue-Light"/>
    </style:style>
    <style:style style:name="T4" style:family="text">
      <style:text-properties fo:color="#153152" loext:opacity="100%" style:font-name="HelveticaNeue-Light" fo:font-weight="bold" style:font-name-asian="HelveticaNeue-Light" style:font-weight-asian="bold" style:font-name-complex="HelveticaNeue-Light" style:font-weight-complex="bold"/>
    </style:style>
    <style:style style:name="T5" style:family="text">
      <style:text-properties fo:color="#555555" loext:opacity="100%"/>
    </style:style>
    <style:style style:name="T6" style:family="text">
      <style:text-properties fo:color="#555555" loext:opacity="100%" style:font-name="HelveticaNeue-Ligh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id24">
        <text:section text:style-name="Sect1" text:name="ta24_1">
          <text:p text:style-name="P1">Introducción de la tarea</text:p>
          <table:table table:name="Tabla1" table:style-name="Tabla1">
            <table:table-column table:style-name="Tabla1.A"/>
            <table:table-row table:style-name="Tabla1.1">
              <table:table-cell table:style-name="Tabla1.A1" office:value-type="string">
                <text:p text:style-name="P2"><text:span text:style-name="Strong_20_Emphasis"><text:span text:style-name="T1">CONTEXTO DE LA TAREA</text:span></text:span><text:span text:style-name="T2"/></text:p>
              </table:table-cell>
            </table:table-row>
            <table:table-row table:style-name="Tabla1.1">
              <table:table-cell table:style-name="Tabla1.A2" office:value-type="string">
                <text:p text:style-name="P3">Con esta tarea aprenderemos a realizar un diseño lógico de una Base de Datos a partir de la descripción de un problema.<text:span text:style-name="T3"/></text:p>
              </table:table-cell>
            </table:table-row>
          </table:table>
          <text:p text:style-name="P4"/>
        </text:section>
      </text:section>
      <text:section text:style-name="Sect1" text:name="id25">
        <text:p text:style-name="P5"/>
        <text:section text:style-name="Sect1" text:name="ta25_1">
          <text:p text:style-name="P1">¿Qué debes hacer?</text:p>
          <table:table table:name="Tabla2" table:style-name="Tabla2">
            <table:table-column table:style-name="Tabla2.A"/>
            <table:table-row table:style-name="Tabla2.1">
              <table:table-cell table:style-name="Tabla2.A1" office:value-type="string">
                <text:p text:style-name="P6">ENUNCIADO DE LA TAREA<text:span text:style-name="T4"/></text:p>
              </table:table-cell>
            </table:table-row>
            <table:table-row table:style-name="Tabla2.1">
              <table:table-cell table:style-name="Tabla2.A2" office:value-type="string">
                <text:p text:style-name="P7">Esta tarea consiste en realizar las siguientes tareas:<text:line-break/></text:p>
                <text:p text:style-name="P8"> </text:p>
                <text:p text:style-name="P3">Una Clínica veterinaria necesita llevar un control informatizado de su gestión de animales y de sus veterinarios.</text:p>
                <text:p text:style-name="P3">De cada animal tenemos la siguiente información: codigo_animal, nombre, dirección, población, provincia, código postal, fecha de nacimiento, telefono_Dueño. (Una aclaración, un animal puede tener varios teléfonos de sus dueños)</text:p>
                <text:p text:style-name="P8"> </text:p>
                <text:p text:style-name="P3">Para cada veterinario que trabaja en la Clínica tenemos la siguiente información: nombre, apellidos, teléfono, numero de colegiado y especialidad.<text:line-break/>(Un veterinario solo puede tener una única especialidad)</text:p>
                <text:p text:style-name="P8"> </text:p>
                <text:p text:style-name="P3">En la clínica se lleva el control de los Ingresos de los animales. De cada ingreso se guarda: El número de ingreso, el número de jaula en la que está cada Animal ingresado y la fecha de ingreso. Un animal puede ingresar en la clínica en más de una ocasión.</text:p>
                <text:p text:style-name="P3">Un veterinario puede visitar a varios animales, mientras que un animal puede ser visitado por varios veterinarios.</text:p>
                <text:p text:style-name="P3">Se pide diseñar el Modelo Entidad-relación cumpliendo los siguientes puntos.</text:p>
                <text:list text:style-name="L1">
                  <text:list-item>
                    <text:p text:style-name="P9">(RA02_b: Se han utilizado herramientas gráficas para representar el diseño lógico).</text:p>
                  </text:list-item>
                </text:list>
                <text:p text:style-name="P10"><text:span text:style-name="T5"> </text:span><text:span text:style-name="Strong_20_Emphasis"><text:span text:style-name="T6">1) Identificar los atributos que caracterizan a cada entidad.</text:span></text:span></text:p>
                <text:list text:style-name="L2">
                  <text:list-item>
                    <text:p text:style-name="P11">(RA02_c: Se han identificado las tablas del diseño lógico).</text:p>
                  </text:list-item>
                </text:list>
                <text:p text:style-name="P10"><text:span text:style-name="Strong_20_Emphasis"><text:span text:style-name="T5"> </text:span></text:span><text:span text:style-name="Strong_20_Emphasis"><text:span text:style-name="T6">2) Identificar las relaciones entre entidades.</text:span></text:span></text:p>
                <text:list text:style-name="L3">
                  <text:list-item>
                    <text:p text:style-name="P12">(RA02_e: Se han identificado las relaciones entre las tablas del diseño lógico).</text:p>
                  </text:list-item>
                </text:list>
                <text:p text:style-name="P10"><text:span text:style-name="Strong_20_Emphasis"><text:span text:style-name="T5"> </text:span></text:span><text:span text:style-name="Strong_20_Emphasis"><text:span text:style-name="T6">3) Representar todos los elementos anteriores en el diagrama entidad-relación.</text:span></text:span></text:p>
                <text:p text:style-name="P3">Una vez completado el modelo entidad-relación, se pide realizar la transformación al modelo relacional teniendo en cuenta los siguientes puntos:</text:p>
                <text:list text:style-name="L4">
                  <text:list-item>
                    <text:p text:style-name="P13">(RA02_g: Se han aplicado las reglas de integridad).</text:p>
                  </text:list-item>
                </text:list>
                <text:p text:style-name="P10"><text:span text:style-name="T6"><text:line-break/></text:span><text:span text:style-name="Strong_20_Emphasis"><text:span text:style-name="T6"> 4) Realizar la Transformación de las Entidades.</text:span></text:span></text:p>
                <text:p text:style-name="P10"><text:span text:style-name="T6"><text:line-break/></text:span><text:span text:style-name="Strong_20_Emphasis"><text:span text:style-name="T6"> 5) Realizar la transformación de los atributos.</text:span></text:span></text:p>
                <text:p text:style-name="P10"><text:span text:style-name="T6"><text:line-break/></text:span><text:span text:style-name="Strong_20_Emphasis"><text:span text:style-name="T6"> 6) Realizar la transformación de las relaciones.</text:span></text:span></text:p>
                <text:p text:style-name="P10"><text:span text:style-name="T6"><text:line-break/></text:span><text:span text:style-name="Strong_20_Emphasis"><text:span text:style-name="T6"> 7) Representar el grafo relacional. </text:span></text:span></text:p>
                <text:p text:style-name="P8"> </text:p>
                <text:p text:style-name="P8"><text:soft-page-break/> <text:span text:style-name="T3"/></text:p>
              </table:table-cell>
            </table:table-row>
            <table:table-row table:style-name="Tabla2.1">
              <table:table-cell table:style-name="Tabla2.A3" office:value-type="string">
                <text:p text:style-name="P14"/>
              </table:table-cell>
            </table:table-row>
          </table:table>
          <text:p text:style-name="P4"/>
        </text:section>
      </text:section>
      <text:section text:style-name="Sect1" text:name="id26">
        <text:p text:style-name="P5"/>
        <text:section text:style-name="Sect1" text:name="ta26_1">
          <text:p text:style-name="P1">¿Qué debes tener en cuenta para resolver la tarea?</text:p>
          <table:table table:name="Tabla3" table:style-name="Tabla3">
            <table:table-column table:style-name="Tabla3.A"/>
            <table:table-row table:style-name="Tabla3.1">
              <table:table-cell table:style-name="Tabla3.A1" office:value-type="string">
                <text:p text:style-name="P2"><text:span text:style-name="Strong_20_Emphasis"><text:span text:style-name="T1">CONSEJOS Y RECOMENDACIONES PARA REALIZAR LA TAREA.</text:span></text:span><text:span text:style-name="T2"/></text:p>
              </table:table-cell>
            </table:table-row>
            <table:table-row table:style-name="Tabla3.2">
              <table:table-cell table:style-name="Tabla3.A2" office:value-type="string">
                <text:p text:style-name="P3">Para realizar esta tarea es aconsejable revisar los siguientes contenidos de la Unidad 2:</text:p>
                <text:list text:style-name="L5">
                  <text:list-item>
                    <text:p text:style-name="P15">Punto 4. Modelo Entidad/Relación.</text:p>
                  </text:list-item>
                  <text:list-item>
                    <text:p text:style-name="P15">Punto 6. Diagrama E/R en un supuesto practico, paso a paso.</text:p>
                  </text:list-item>
                  <text:list-item>
                    <text:p text:style-name="P15">Punto 8. Paso del Modelo E/R al modelo Relacional.</text:p>
                  </text:list-item>
                  <text:list-item>
                    <text:p text:style-name="P15">Punto 9. Normalización.</text:p>
                  </text:list-item>
                  <text:list-item>
                    <text:p text:style-name="P16">Finalmente revisar los ejercicios resueltos: Modelo Entidad Relación Granja Escuela, Modelo Entidad Relación Compañía de Seguros, Modelo E/R, Formas Normales.<text:span text:style-name="T3"/></text:p>
                  </text:list-item>
                </text:list>
              </table:table-cell>
            </table:table-row>
          </table:table>
          <text:p text:style-name="P4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Verdana, Helvetica, sans-serif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10:26:18.448409900</meta:creation-date>
    <dc:date>2026-06-15T10:26:35.479517300</dc:date>
    <meta:editing-duration>PT17S</meta:editing-duration>
    <meta:editing-cycles>1</meta:editing-cycles>
    <meta:document-statistic meta:table-count="3" meta:image-count="0" meta:object-count="0" meta:page-count="2" meta:paragraph-count="37" meta:word-count="393" meta:character-count="2567" meta:non-whitespace-character-count="2197"/>
    <meta:generator>LibreOffice/26.2.3.2$Windows_X86_64 LibreOffice_project/70e089b17412e4cb7773e41413306b17a2328c34</meta:generator>
  </office:meta>
</office:document-meta>
</file>