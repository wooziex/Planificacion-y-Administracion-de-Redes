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2" style:family="table-row">
      <style:table-row-properties fo:background-color="#c3dcf7">
        <style:background-image/>
      </style:table-row-properties>
    </style:style>
    <style:style style:name="Tabla2.A2" style:family="table-cell">
      <style:table-cell-properties style:vertical-align="middle" fo:padding-left="1.588cm" fo:padding-right="0.049cm" fo:padding-top="0.049cm" fo:padding-bottom="0.049cm" fo:border="0.5pt solid #d4e0ee"/>
    </style:style>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able_20_Heading">
      <style:paragraph-properties fo:margin-left="0cm" fo:margin-right="0cm" fo:margin-top="0cm" fo:margin-bottom="0cm" style:contextual-spacing="false" fo:line-height="115%" fo:text-align="center" style:justify-single-word="false" fo:orphans="2" fo:widows="2" fo:text-indent="0cm" style:auto-text-indent="false"/>
    </style:style>
    <style:style style:name="P4" style:family="paragraph" style:parent-style-name="Table_20_Contents">
      <style:paragraph-properties fo:margin-left="0cm" fo:margin-right="0cm" fo:margin-top="0cm" fo:margin-bottom="0cm" style:contextual-spacing="false" fo:line-height="115%" fo:text-align="justify" style:justify-single-word="false" fo:orphans="2" fo:widows="2" fo:text-indent="0cm" style:auto-text-indent="false"/>
      <style:text-properties fo:color="#555555" loext:opacity="100%" style:font-name="HelveticaNeue-Light"/>
    </style:style>
    <style:style style:name="P5" style:family="paragraph" style:parent-style-name="Table_20_Contents">
      <style:paragraph-properties fo:margin-left="0cm" fo:margin-right="0cm" fo:margin-top="0cm" fo:margin-bottom="0cm" style:contextual-spacing="false" fo:line-height="115%" fo:text-align="justify" style:justify-single-word="false" fo:orphans="2" fo:widows="2" fo:text-indent="0cm" style:auto-text-indent="false"/>
      <style:text-properties fo:color="#555555" loext:opacity="100%"/>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HelveticaNeue-Light" fo:font-size="12pt" fo:font-weight="normal"/>
    </style:style>
    <style:style style:name="P9" style:family="paragraph" style:parent-style-name="Table_20_Heading">
      <style:paragraph-properties fo:margin-left="0cm" fo:margin-right="0cm" fo:margin-top="0cm" fo:margin-bottom="0cm" style:contextual-spacing="false" fo:line-height="115%" fo:text-align="center" style:justify-single-word="false" fo:orphans="2" fo:widows="2" fo:text-indent="0cm" style:auto-text-indent="false"/>
      <style:text-properties fo:color="#000000" loext:opacity="100%" style:font-name="HelveticaNeue-Light" fo:font-size="18pt" fo:font-weight="bold"/>
    </style:style>
    <style:style style:name="P10" style:family="paragraph" style:parent-style-name="Table_20_Contents">
      <loext:graphic-properties draw:fill="bitmap" style:repeat="repeat" draw:fill-image-ref-point="top-left"/>
      <style:paragraph-properties fo:margin-left="1.058cm" fo:margin-right="0cm" fo:margin-top="0cm" fo:margin-bottom="0cm" style:contextual-spacing="false" style:line-height-at-least="0.529cm" fo:text-align="justify" style:justify-single-word="false" fo:orphans="2" fo:widows="2" fo:text-indent="0cm" style:auto-text-indent="false" fo:padding-left="0.049cm" fo:padding-right="0cm" fo:padding-top="0cm" fo:padding-bottom="0.049cm" fo:border-left="0.06pt solid #cccccc" fo:border-right="none" fo:border-top="none" fo:border-bottom="0.06pt solid #cccccc">
        <style:background-image/>
      </style:paragraph-properties>
      <style:text-properties fo:color="#0f243e" loext:opacity="100%" style:font-name="Courier New" fo:letter-spacing="-0.004cm"/>
    </style:style>
    <style:style style:name="P11" style:family="paragraph" style:parent-style-name="Table_20_Contents">
      <style:paragraph-properties fo:margin-left="0cm" fo:margin-right="0cm" fo:margin-top="0cm" fo:margin-bottom="0cm" style:contextual-spacing="false" fo:line-height="115%" fo:text-align="justify" style:justify-single-word="false" fo:orphans="2" fo:widows="2" fo:text-indent="0cm" style:auto-text-indent="false"/>
    </style:style>
    <style:style style:name="P12" style:family="paragraph" style:parent-style-name="Table_20_Contents" style:list-style-name="L1">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13" style:family="paragraph" style:parent-style-name="Table_20_Contents" style:list-style-name="L2">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14" style:family="paragraph" style:parent-style-name="Table_20_Contents" style:list-style-name="L3">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15" style:family="paragraph" style:parent-style-name="Table_20_Contents" style:list-style-name="L4">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16" style:family="paragraph" style:parent-style-name="Table_20_Contents" style:list-style-name="L5">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17" style:family="paragraph" style:parent-style-name="Table_20_Contents" style:list-style-name="L6">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18" style:family="paragraph" style:parent-style-name="Table_20_Contents" style:list-style-name="L7">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19" style:family="paragraph" style:parent-style-name="Table_20_Contents" style:list-style-name="L8">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20" style:family="paragraph" style:parent-style-name="Table_20_Contents" style:list-style-name="L9">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21" style:family="paragraph" style:parent-style-name="Table_20_Contents" style:list-style-name="L10">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22" style:family="paragraph" style:parent-style-name="Table_20_Contents" style:list-style-name="L11">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23" style:family="paragraph" style:parent-style-name="Table_20_Contents" style:list-style-name="L12">
      <style:paragraph-properties fo:margin-left="0cm" fo:margin-right="0cm" fo:margin-top="0cm" fo:margin-bottom="0.499cm" style:contextual-spacing="false" fo:line-height="115%" fo:text-align="justify" style:justify-single-word="false" fo:orphans="2" fo:widows="2" fo:text-indent="0cm" style:auto-text-indent="false"/>
      <style:text-properties fo:color="#555555" loext:opacity="100%" style:font-name="HelveticaNeue-Light"/>
    </style:style>
    <style:style style:name="P24" style:family="paragraph" style:parent-style-name="Text_20_body">
      <style:paragraph-properties fo:margin-left="0cm" fo:margin-right="0cm" fo:text-align="justify" style:justify-single-word="false" fo:orphans="2" fo:widows="2" fo:text-indent="0cm" style:auto-text-indent="false"/>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153152" loext:opacity="100%" style:font-name="HelveticaNeue-Light" fo:font-weight="bold" style:font-name-asian="HelveticaNeue-Light" style:font-weight-asian="bold" style:font-name-complex="HelveticaNeue-Light" style:font-weight-complex="bold"/>
    </style:style>
    <style:style style:name="T5" style:family="text">
      <style:text-properties fo:color="#555555" loext:opacity="100%" style:font-name="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id24">
        <text:section text:style-name="Sect1" text:name="ta24_1">
          <text:p text:style-name="P2">Introducción de la tarea</text:p>
          <table:table table:name="Tabla1" table:style-name="Tabla1">
            <table:table-column table:style-name="Tabla1.A"/>
            <table:table-row table:style-name="Tabla1.1">
              <table:table-cell table:style-name="Tabla1.A1" office:value-type="string">
                <text:p text:style-name="P3"><text:span text:style-name="Strong_20_Emphasis"><text:span text:style-name="T1">CONTEXTO DE LA TAREA</text:span></text:span><text:span text:style-name="T2"/></text:p>
              </table:table-cell>
            </table:table-row>
            <table:table-row table:style-name="Tabla1.1">
              <table:table-cell table:style-name="Tabla1.A2" office:value-type="string">
                <text:p text:style-name="P4">Durante las tareas anteriores, se llevó a cabo la creación de una base de datos, en la presente tarea se va a dar el siguiente paso y se va a aprender a consultar la información almacenada en la base de datos.</text:p>
                <text:p text:style-name="P5"> </text:p>
                <text:p text:style-name="P4">Para realizar esta tarea es aconsejable revisar los contenidos de la Unidad 4.<text:span text:style-name="T3"/></text:p>
              </table:table-cell>
            </table:table-row>
          </table:table>
          <text:p text:style-name="P6"/>
        </text:section>
      </text:section>
      <text:section text:style-name="Sect1" text:name="id25">
        <text:p text:style-name="P7"/>
        <text:section text:style-name="Sect1" text:name="ta25_1">
          <text:p text:style-name="P8">¿Qué debes hacer?</text:p>
          <table:table table:name="Tabla2" table:style-name="Tabla2">
            <table:table-column table:style-name="Tabla2.A"/>
            <table:table-row table:style-name="Tabla2.1">
              <table:table-cell table:style-name="Tabla2.A1" office:value-type="string">
                <text:p text:style-name="P9">ENUNCIADO DE LA TAREA<text:span text:style-name="T4"/></text:p>
              </table:table-cell>
            </table:table-row>
            <table:table-row table:style-name="Tabla2.2">
              <table:table-cell table:style-name="Tabla2.A2" office:value-type="string">
                <text:p text:style-name="P4">El objetivo principal de esta tarea es la realización de consultas SQL de la base de datos.</text:p>
                <text:p text:style-name="P5"> </text:p>
                <text:p text:style-name="P4">Para la realización de esta tarea, se deberá usar el esquema “HR” con el que se viene trabajando a lo largo del curso.</text:p>
                <text:p text:style-name="P4"><text:line-break/>Si todavía no habéis conectado al esquema HR, será necesario establecer una contraseña valida, para ello realizar los siguientes pasos</text:p>
                <text:p text:style-name="P4">Con SQL PLUS (desde un cmd)</text:p>
                <text:p text:style-name="P5"> </text:p>
                <text:p text:style-name="P10">Connect sys/oracle AS sysdba;</text:p>
                <text:p text:style-name="P4">alter user HR identified by HR;</text:p>
                <text:p text:style-name="P4">Con esto restablecemos la contraseña del usuario HR con HR.</text:p>
                <text:p text:style-name="P4">Nota: Esta forma de conexión, ha sido utilizada con las credenciales de la máquina virtual, en caso de haber instalado Oracle 11g en cualquier otra máquina se deben seguir los mismos pasos con las credenciales asignadas al administrador en el momento de la instalación.</text:p>
                <text:p text:style-name="P5"> </text:p>
                <text:p text:style-name="P4">Se pide realizar las siguientes consultas:</text:p>
                <text:p text:style-name="P11"><text:span text:style-name="Strong_20_Emphasis"><text:span text:style-name="T5">RA04_d: Se han realizado consultas sobre el contenido de varias tablas mediante composiciones internas.</text:span></text:span></text:p>
                <text:list text:style-name="L1">
                  <text:list-item>
                    <text:p text:style-name="P12">El departamento de recursos humanos desea que una consulta muestre el LAST_NAME y FIRST_NAME de los empleados (TABLA EMPLOYEES) en un solo campo llamado “NOMBRE”</text:p>
                  </text:list-item>
                </text:list>
                <text:list text:style-name="L2">
                  <text:list-item>
                    <text:p text:style-name="P13">Se necesita saber por departamentos el Salario total que ganan todos sus empleados, para ello usareis la tabla EMPLOYEES, donde tenéis el Salary y el Departament_id.</text:p>
                  </text:list-item>
                </text:list>
                <text:list text:style-name="L3">
                  <text:list-item>
                    <text:p text:style-name="P14">El departamento de recursos humanos necesita encontrar los empleados con salarios tanto muy altos como muy bajos, para ello se debe mostrar EMPLOYEE_ID  y el salario de cualquier empleado cuyo salario NO esté <text:soft-page-break/>entre 5000 y 12000 €.</text:p>
                  </text:list-item>
                </text:list>
                <text:list text:style-name="L4">
                  <text:list-item>
                    <text:p text:style-name="P15">Escriba una consulta que obtenga el nombre del departamento y de los empleados. Utilice las tablas EMPLOYEES y DEPARTMENTS.</text:p>
                  </text:list-item>
                </text:list>
                <text:p text:style-name="P11"><text:span text:style-name="Strong_20_Emphasis"><text:span text:style-name="T5">RA04_e: Se han realizado consultas sobre el contenido de varias tablas mediante composiciones externas.</text:span></text:span></text:p>
                <text:p text:style-name="P5"> </text:p>
                <text:p text:style-name="P5"> </text:p>
                <text:p text:style-name="P11"><text:span text:style-name="T5">Se pide realizar las siguientes consultas con el </text:span><text:span text:style-name="Strong_20_Emphasis"><text:span text:style-name="T5">ASESOR DE CONSOLTAS DEL SQL DEVELOPER.</text:span></text:span><text:span text:style-name="T5"> </text:span></text:p>
                <text:p text:style-name="P11"/>
                <text:list text:style-name="L5">
                  <text:list-item>
                    <text:p text:style-name="P16">El departamento de recursos humanos desea que una consulta muestre el LAST_NAME y FIRST_NAME de los empleados (TABLA EMPLOYEES) en un solo campo llamado “NOMBRE”</text:p>
                  </text:list-item>
                </text:list>
                <text:list text:style-name="L6">
                  <text:list-item>
                    <text:p text:style-name="P17">El departamento de recursos humanos necesita encontrar los empleados con salarios tanto muy altos como muy bajos, para ello se debe mostrar EMPLOYEE_ID  y el salario de cualquier empleado cuyo salario NO esté entre 5000 y 12000 €.</text:p>
                  </text:list-item>
                </text:list>
                <text:list text:style-name="L7">
                  <text:list-item>
                    <text:p text:style-name="P18">Se necesita saber por departamentos el Salario total que ganan todos sus empleados, para ello usareis la tabla EMPLOYEES, donde tenéis el Salary y el Departament_id.</text:p>
                  </text:list-item>
                </text:list>
                <text:list text:style-name="L8">
                  <text:list-item>
                    <text:p text:style-name="P19">Escriba una consulta que obtenga el nombre del departamento y de los empleados. Utilice las tablas EMPLOYEES y DEPARTMENTS.</text:p>
                  </text:list-item>
                </text:list>
                <text:list text:style-name="L9">
                  <text:list-item>
                    <text:p text:style-name="P20">Escriba una consulta que obtenga el nombre del departamento y de los empleados. Tiene que salir en la consulta todos los nombres de los departamentos aunque no tenga empleados. Utilice las tablas EMPLOYEES y DEPARTMENTS.</text:p>
                  </text:list-item>
                </text:list>
                <text:list text:style-name="L10">
                  <text:list-item>
                    <text:p text:style-name="P21">Obtener mediante una subconsulta, el First_name del empleado cuyo salario sea el mayor de todos. </text:p>
                  </text:list-item>
                </text:list>
                <text:p text:style-name="P11"><text:span text:style-name="T5"><text:line-break/></text:span><text:span text:style-name="Strong_20_Emphasis"><text:span text:style-name="T5">RA04_f: Se han realizado consultas con subconsultas.</text:span></text:span></text:p>
                <text:list text:style-name="L11">
                  <text:list-item>
                    <text:p text:style-name="P22">Obtener mediante una subconsulta, el First_name del empleado cuyo salario sea el mayor de todos. </text:p>
                  </text:list-item>
                </text:list>
                <text:list text:style-name="L12">
                  <text:list-item>
                    <text:p text:style-name="P23">Escriba una consulta que obtenga el nombre del departamento y de los empleados. Tiene que salir en la consulta todos los nombres de los departamentos aunque no tenga empleados. Utilice las tablas EMPLOYEES y DEPARTMENTS.<text:span text:style-name="T3"/></text:p>
                  </text:list-item>
                </text:list>
              </table:table-cell>
            </table:table-row>
          </table:table>
          <text:p text:style-name="P6"><text:soft-page-break/></text:p>
        </text:section>
      </text:section>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29:17.996989000</meta:creation-date>
    <dc:date>2026-06-15T10:30:06.577288100</dc:date>
    <meta:editing-duration>PT48S</meta:editing-duration>
    <meta:editing-cycles>1</meta:editing-cycles>
    <meta:document-statistic meta:table-count="2" meta:image-count="0" meta:object-count="0" meta:page-count="3" meta:paragraph-count="37" meta:word-count="582" meta:character-count="3527" meta:non-whitespace-character-count="2975"/>
    <meta:generator>LibreOffice/26.2.3.2$Windows_X86_64 LibreOffice_project/70e089b17412e4cb7773e41413306b17a2328c34</meta:generator>
  </office:meta>
</office:document-meta>
</file>