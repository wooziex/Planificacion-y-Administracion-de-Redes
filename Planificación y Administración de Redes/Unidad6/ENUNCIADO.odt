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8000002AC5E942AF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41.434cm" table:align="left"/>
    </style:style>
    <style:style style:name="Tabla2.A" style:family="table-column">
      <style:table-column-properties style:column-width="41.434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2pt" style:font-size-asian="2pt" style:font-size-complex="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Heading_20_2">
      <style:paragraph-properties fo:margin-left="0cm" fo:margin-right="0cm" fo:margin-top="0.037cm" fo:margin-bottom="0cm" style:contextual-spacing="false" style:line-height-at-least="0.596cm" fo:text-align="justify" style:justify-single-word="false" fo:text-indent="0cm" style:auto-text-indent="false"/>
      <style:text-properties fo:color="#555555" loext:opacity="100%" style:font-name="Arial2" fo:font-size="15pt" fo:font-weight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13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2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5" style:family="paragraph" style:parent-style-name="Table_20_Contents" style:list-style-name="L2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6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7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8" style:family="paragraph" style:parent-style-name="Table_20_Contents" style:list-style-name="L4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9" style:family="paragraph" style:parent-style-name="Table_20_Contents" style:list-style-name="L4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20" style:family="paragraph" style:parent-style-name="Table_20_Contents" style:list-style-name="L4">
      <style:paragraph-properties fo:margin-left="0cm" fo:margin-right="0cm" fo:margin-top="0.265cm" fo:margin-bottom="0.499cm" style:contextual-spacing="false" fo:text-indent="0cm" style:auto-text-indent="false"/>
      <style:text-properties fo:color="#555555" loext:opacity="100%" style:font-name="HelveticaNeue-Light"/>
    </style:style>
    <style:style style:name="P21" style:family="paragraph" style:parent-style-name="Table_20_Contents" style:list-style-name="L5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22" style:family="paragraph" style:parent-style-name="Table_20_Contents" style:list-style-name="L5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3" style:family="paragraph" style:parent-style-name="Table_20_Contents" style:list-style-name="L6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able_20_Contents" style:list-style-name="L7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26" style:family="paragraph" style:parent-style-name="Table_20_Contents" style:list-style-name="L7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153152" loext:opacity="100%" style:font-name="HelveticaNeue-Light" fo:font-weight="bold"/>
    </style:style>
    <style:style style:name="T5" style:family="text">
      <style:text-properties fo:color="#153152" loext:opacity="100%" style:font-name="HelveticaNeue-Light" fo:font-weight="bold" style:font-name-asian="HelveticaNeue-Light" style:font-weight-asian="bold" style:font-name-complex="HelveticaNeue-Light" style:font-weight-complex="bold"/>
    </style:style>
    <style:style style:name="T6" style:family="text">
      <style:text-properties fo:color="#555555" loext:opacity="100%" style:font-name="HelveticaNeue-Ligh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Se va a configurar un red de cuatro routers conectados entre si y formando cada uno una red local. Se requiere la configuración de un protocolo de enrutamiento dinámico basado en vector-distancia para la red propuesta.</text:p>
                <text:p text:style-name="P3">Para realizar esta tarea es aconsejable revisar los contenidos de la Unidad 6.<text:span text:style-name="T3"/></text:p>
              </table:table-cell>
            </table:table-row>
          </table:table>
          <text:p text:style-name="P4"/>
        </text:section>
      </text:section>
      <text:section text:style-name="Sect1" text:name="id25">
        <text:p text:style-name="P5"/>
        <text:section text:style-name="Sect1" text:name="ta25_1">
          <text:p text:style-name="P5"/>
          <text:section text:style-name="Sect1" text:name="Sección1">
            <text:p text:style-name="P6"><text:bookmark text:name="ta25_1"/></text:p>
            <text:p text:style-name="P7">¿Qué debes hacer?</text:p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2"><text:span text:style-name="Strong_20_Emphasis"><text:span text:style-name="T4">ENUNCIADO DE LA TAREA</text:span></text:span><text:span text:style-name="T5"/></text:p>
                </table:table-cell>
              </table:table-row>
              <table:table-row table:style-name="Tabla2.1">
                <table:table-cell table:style-name="Tabla2.A2" office:value-type="string">
                  <text:p text:style-name="P8"/>
                  <text:h text:style-name="P9" text:outline-level="2">Tarea: Crear una VLAN</text:h>
                  <text:p text:style-name="P10"><text:span text:style-name="T6"><text:line-break/><text:line-break/></text:span><text:span text:style-name="Strong_20_Emphasis"><text:span text:style-name="T6">RA06_b) Se han configurado redes con el protocolo RIPv2.</text:span></text:span></text:p>
                  <text:p text:style-name="P11"/>
                  <text:p text:style-name="P3">El alumno deberá crear en Packet Tracer la siguiente topología:</text:p>
                  <text:p text:style-name="P12"><text:soft-page-break/><draw:frame draw:style-name="fr1" draw:name="Imagen1" text:anchor-type="as-char" svg:width="24.342cm" svg:height="18.098cm" draw:z-index="0"><draw:image xlink:href="Pictures/1000000000000398000002AC5E942AFF.jpg" xlink:type="simple" xlink:show="embed" xlink:actuate="onLoad" draw:mime-type="image/jpeg"/><svg:title>Red a configurar en la tarea 6</svg:title></draw:frame></text:p>
                  <text:p text:style-name="P3">El alumno debe sustituir el nombre de los routers R1, R2, R3 y R4 por [apellido_alumno]1, [apellido_alumno]2, [apellido_alumno]3 y [apellido_alumno]4. </text:p>
                  <text:list text:style-name="L1">
                    <text:list-item>
                      <text:p text:style-name="P13">Ejemplo: "Mendoza1", "Mendoza2", "Mendoza3" y "Mendoza4"</text:p>
                    </text:list-item>
                  </text:list>
                  <text:p text:style-name="P3">Por lo tanto, el alumno:</text:p>
                  <text:list text:style-name="L2">
                    <text:list-item>
                      <text:p text:style-name="P14">Deberá crear las redes locales que forman cada router con el switch. El direccionamiento de cada LAN será:</text:p>
                      <text:list>
                        <text:list-item>
                          <text:p text:style-name="P15">En R1 con su red local (S1): 192.168.1.0/24</text:p>
                        </text:list-item>
                        <text:list-item>
                          <text:p text:style-name="P15">En R2 con su red local (S2): 192.168.2.0/24</text:p>
                        </text:list-item>
                        <text:list-item>
                          <text:p text:style-name="P15">En R3 con su red local (S3): 192.168.3.0/24</text:p>
                        </text:list-item>
                        <text:list-item>
                          <text:p text:style-name="P15">En R4 con su red local (S4): 192.168.4.0/24</text:p>
                        </text:list-item>
                      </text:list>
                    </text:list-item>
                    <text:list-item>
                      <text:p text:style-name="P14">Deberá unir cada router entre sí con una conexión serial y configurar el direccionamiento IP de las redes entre routers, de forma que desperdicien el menor numero de hosts (enlaces /30).</text:p>
                      <text:list>
                        <text:list-item>
                          <text:p text:style-name="P15">Por ejemplo podría utilizar estas 4 redes para conectar los routers entre sí.</text:p>
                          <text:list>
                            <text:list-item>
                              <text:p text:style-name="P15">Entre R1 y R2: 10.0.0.0/30</text:p>
                            </text:list-item>
                            <text:list-item>
                              <text:p text:style-name="P15"><text:soft-page-break/>Entre R1 y R3: 10.0.0.4/30</text:p>
                            </text:list-item>
                            <text:list-item>
                              <text:p text:style-name="P15">Entre R2 y R4: 10.0.0.8/30</text:p>
                            </text:list-item>
                            <text:list-item>
                              <text:p text:style-name="P15">Entre R3 y R4: 10.0.0.12/3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Deberá configurar el enrutamiento dinámico basado en vector-distancia en los routers.</text:p>
                      <text:list>
                        <text:list-item>
                          <text:p text:style-name="P15">Tipo: RIP</text:p>
                        </text:list-item>
                        <text:list-item>
                          <text:p text:style-name="P15">Versión: 2</text:p>
                        </text:list-item>
                        <text:list-item>
                          <text:p text:style-name="P15">Sin sumarización automática.</text:p>
                        </text:list-item>
                        <text:list-item>
                          <text:p text:style-name="P15">Sin enviar la información por el enlace que forma la red local (enlace pasivo).</text:p>
                        </text:list-item>
                      </text:list>
                    </text:list-item>
                    <text:list-item>
                      <text:p text:style-name="P14">Deberá mostrar la información de la tabla de enrutamiento en cada router y explicar los resultados de la misma.</text:p>
                    </text:list-item>
                    <text:list-item>
                      <text:p text:style-name="P14">Deberá mostrar la configuración de cada router (show run).</text:p>
                    </text:list-item>
                    <text:list-item>
                      <text:p text:style-name="P16">Deberá mostrar el correcto funcionamiento de la red realizando un PING desde un PC a cada PC de las otras 3 LANs.</text:p>
                    </text:list-item>
                  </text:list>
                  <text:list text:style-name="L3">
                    <text:list-item>
                      <text:p text:style-name="P17">Ejecute el/los comandos con el que podemos comprobar el protocolo de enrutamiento configurado.</text:p>
                    </text:list-item>
                  </text:list>
                  <text:p text:style-name="P10"><text:span text:style-name="Strong_20_Emphasis"><text:span text:style-name="T6">RA06_f) Se han realizado agrupaciones de redes con CIDR.</text:span></text:span></text:p>
                  <text:list text:style-name="L4">
                    <text:list-item>
                      <text:p text:style-name="P18">Divide la red 192.168.1.0/24 en redes /26, indicando:</text:p>
                      <text:list>
                        <text:list-item>
                          <text:p text:style-name="P19">Dirección de red</text:p>
                        </text:list-item>
                        <text:list-item>
                          <text:p text:style-name="P19">Primer host disponible</text:p>
                        </text:list-item>
                        <text:list-item>
                          <text:p text:style-name="P19">Ultimo host disponible</text:p>
                        </text:list-item>
                        <text:list-item>
                          <text:p text:style-name="P20">Dirección de difusión.</text:p>
                        </text:list-item>
                      </text:list>
                    </text:list-item>
                  </text:list>
                  <text:p text:style-name="P10"><text:span text:style-name="T6"><text:line-break/></text:span><text:span text:style-name="Strong_20_Emphasis"><text:span text:style-name="T6">RA06_g) Se ha habilitado y configurado OSPF en un router.</text:span></text:span></text:p>
                  <text:list text:style-name="L5">
                    <text:list-item>
                      <text:p text:style-name="P21">¿En que se basa el protocolo OSPF para calcular la distancia hasta la red de destino?</text:p>
                    </text:list-item>
                    <text:list-item>
                      <text:p text:style-name="P21">Indique el comando para identificar el router como 1.1.1.1 en el protocolo OSPF</text:p>
                    </text:list-item>
                    <text:list-item>
                      <text:p text:style-name="P21">Indique el comando OSPF para anunciar la red 192.168.1.0/24 en el area 0</text:p>
                    </text:list-item>
                    <text:list-item>
                      <text:p text:style-name="P21">Indique el comando OSPF para anunciar la red 10.0.0.0/30 en el area 0</text:p>
                    </text:list-item>
                    <text:list-item>
                      <text:p text:style-name="P22">Indique el comando OSPF para anunciar la red 10.0.0.4/30 en el area 0</text:p>
                    </text:list-item>
                  </text:list>
                  <text:p text:style-name="P10"><text:span text:style-name="T6"><text:line-break/></text:span><text:span text:style-name="Strong_20_Emphasis"><text:span text:style-name="T6">RA06_h) Se ha establecido y propagado una ruta por defecto usando OSPF.</text:span></text:span></text:p>
                  <text:list text:style-name="L6">
                    <text:list-item>
                      <text:p text:style-name="P23">¿Qué símbolo indica en una tabla de routing que la ruta ha sido calculada por OSPF?<text:span text:style-name="T3"/></text:p>
                    </text:list-item>
                  </text:list>
                </table:table-cell>
              </table:table-row>
            </table:table>
            <text:p text:style-name="P4"/>
          </text:section>
        </text:section>
      </text:section>
      <text:section text:style-name="Sect1" text:name="id26">
        <text:p text:style-name="P24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2">
              <table:table-cell table:style-name="Tabla3.A2" office:value-type="string">
                <text:p text:style-name="P3">Para realizar esta tarea es aconsejable seguir los siguientes pasos:</text:p>
                <text:list text:style-name="L7">
                  <text:list-item>
                    <text:p text:style-name="P25">Repasar el videoconcepto "Configuración de RIP v2".</text:p>
                  </text:list-item>
                  <text:list-item>
                    <text:p text:style-name="P25">Repasar el videoconcepto "Tabla de routing"</text:p>
                  </text:list-item>
                  <text:list-item>
                    <text:p text:style-name="P25">Repasar el ejercicio resuelto: "Configuración de RIP v2".</text:p>
                  </text:list-item>
                  <text:list-item>
                    <text:p text:style-name="P26">Una vez visualizada la sesión online sobre la configuración de RIPv2 puede iniciar <text:soft-page-break/>la tarea. </text:p>
                  </text:list-item>
                </text:list>
                <text:p text:style-name="P3">Ante cualquier duda, consulte con su docente.<text:span text:style-name="T3"/></text:p>
              </table:table-cell>
            </table:table-row>
          </table:table>
          <text:p text:style-name="P4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10:40.325134000</meta:creation-date>
    <dc:date>2026-06-15T06:10:59.654804100</dc:date>
    <meta:editing-duration>PT19S</meta:editing-duration>
    <meta:editing-cycles>1</meta:editing-cycles>
    <meta:document-statistic meta:table-count="3" meta:image-count="1" meta:object-count="0" meta:page-count="4" meta:paragraph-count="55" meta:word-count="567" meta:character-count="3255" meta:non-whitespace-character-count="2772"/>
    <meta:generator>LibreOffice/26.2.3.2$Windows_X86_64 LibreOffice_project/70e089b17412e4cb7773e41413306b17a2328c34</meta:generator>
  </office:meta>
</office:document-meta>
</file>