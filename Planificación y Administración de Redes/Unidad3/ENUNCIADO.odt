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 fo:font-size="12pt" fo:font-weight="bold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2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7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8" style:family="paragraph" style:parent-style-name="Table_20_Contents" style:list-style-name="L4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555555" loext:opacity="100%" style:font-name="HelveticaNeue-Light" fo:font-weight="bold"/>
    </style:style>
    <style:style style:name="P20" style:family="paragraph" style:parent-style-name="Table_20_Contents" style:list-style-name="L5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1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able_20_Contents" style:list-style-name="L6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4" style:family="paragraph" style:parent-style-name="Table_20_Contents" style:list-style-name="L6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25" style:family="paragraph" style:parent-style-name="Table_20_Contents" style:list-style-name="L6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6" style:family="paragraph" style:parent-style-name="Table_20_Contents" style:list-style-name="L7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7" style:family="paragraph" style:parent-style-name="Table_20_Contents" style:list-style-name="L8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8" style:family="paragraph" style:parent-style-name="Table_20_Contents" style:list-style-name="L9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9" style:family="paragraph" style:parent-style-name="Table_20_Contents" style:list-style-name="L10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30" style:family="paragraph" style:parent-style-name="Table_20_Contents" style:list-style-name="L1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31" style:family="paragraph" style:parent-style-name="Table_20_Contents" style:list-style-name="L1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555555" loext:opacity="100%" style:font-name="HelveticaNeue-Light" fo:font-size="12pt"/>
    </style:style>
    <style:style style:name="T6" style:family="text">
      <style:text-properties fo:color="#555555" loext:opacity="100%"/>
    </style:style>
    <style:style style:name="T7" style:family="text">
      <style:text-properties fo:font-size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Se ha decidido ampliar la red de nuestra empresa con la inclusión de dos nuevas salas de puestos. Para conectar todos esos puestos a la red se han adquirido dos nuevos switches CISCO 2960. El administrador de la red nos ha pedido que hagamos la configuración básica los switches para conectarlos a la red de la empresa.</text:p>
                <text:p text:style-name="P4"> </text:p>
                <text:p text:style-name="P3">Para realizar esta tarea es aconsejable revisar los contenidos de la Unidad 3</text:p>
                <text:p text:style-name="P3">.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7">Situación: </text:p>
                <text:p text:style-name="P8"/>
                <text:p text:style-name="P9"><text:span text:style-name="Strong_20_Emphasis"><text:span text:style-name="T4">Escenario:</text:span></text:span><text:span text:style-name="T4"> </text:span></text:p>
                <text:list text:style-name="L1">
                  <text:list-item>
                    <text:p text:style-name="P10">Tenemos una red compuesta por dos switches y 4 equipos.</text:p>
                  </text:list-item>
                  <text:list-item>
                    <text:p text:style-name="P10">Cada switch tendrá dos equipos conectados a él</text:p>
                  </text:list-item>
                  <text:list-item>
                    <text:p text:style-name="P11">Ambos switches estarán conectados entre sí.</text:p>
                  </text:list-item>
                </text:list>
                <text:p text:style-name="P9"><text:span text:style-name="Strong_20_Emphasis"><text:span text:style-name="T4">Denominaciones:</text:span></text:span></text:p>
                <text:list text:style-name="L2">
                  <text:list-item>
                    <text:p text:style-name="P12">El primer Switch se denominará con el primer apellido del alumno +"1".</text:p>
                  </text:list-item>
                  <text:list-item>
                    <text:p text:style-name="P12">El segundo Switch se denominará con el primer apellido del alumno +"2".</text:p>
                    <text:list>
                      <text:list-item>
                        <text:p text:style-name="P13">Por ejemplo: "Mendoza1" y "Mendoza2"</text:p>
                      </text:list-item>
                    </text:list>
                  </text:list-item>
                  <text:list-item>
                    <text:p text:style-name="P12">Los dos equipos conectados al primer switch se denominarán: pc1.1 y pc1.2</text:p>
                  </text:list-item>
                  <text:list-item>
                    <text:p text:style-name="P14">Los dos equipos conectados al segundo switch se denominarán: pc2.1 y pc2.2</text:p>
                  </text:list-item>
                </text:list>
                <text:p text:style-name="P9"><text:span text:style-name="Strong_20_Emphasis"><text:span text:style-name="T4">Direccionamiento de red</text:span></text:span></text:p>
                <text:list text:style-name="L3">
                  <text:list-item>
                    <text:p text:style-name="P15">La red es 192.168.1.0/24 (mascara 255.255.255.0)</text:p>
                  </text:list-item>
                  <text:list-item>
                    <text:p text:style-name="P15">El primer switch tendrá la dirección de red: 192.168.1.1 (VLAN 99)</text:p>
                  </text:list-item>
                  <text:list-item>
                    <text:p text:style-name="P15">El segundo switch tendrá la dirección de red: 192.168.1.2 (VLAN 99)</text:p>
                  </text:list-item>
                  <text:list-item>
                    <text:p text:style-name="P15">Los equipos conectados al primer switch tendrán la dirección de red: 192.168.1.11 y 192.168.1.12 respectivamente</text:p>
                  </text:list-item>
                  <text:list-item>
                    <text:p text:style-name="P16">Los equipos conectados al segundo switch tendrán la dirección de red: 192.168.1.21 y 192.168.1.22 respectivamente</text:p>
                  </text:list-item>
                </text:list>
                <text:p text:style-name="P9"><text:span text:style-name="Strong_20_Emphasis"><text:span text:style-name="T5">Tareas:</text:span></text:span></text:p>
                <text:p text:style-name="P8"/>
                <text:p text:style-name="P9"><text:span text:style-name="Strong_20_Emphasis"><text:span text:style-name="T4">RA03_h) Se han utilizado los comandos proporcionados por el sistema operativo del conmutador que permiten hacer el seguimiento de posibles incidencias.</text:span></text:span></text:p>
                <text:list text:style-name="L4">
                  <text:list-item>
                    <text:p text:style-name="P17">Crear el mapa topológico de la red planteada en Packet Tracer.</text:p>
                  </text:list-item>
                  <text:list-item>
                    <text:p text:style-name="P18">Configure el nombre y dirección IP de cada equipo</text:p>
                  </text:list-item>
                </text:list>
                <text:p text:style-name="P19">Paso 1: Configuración inicial</text:p>
                <text:list text:style-name="L5">
                  <text:list-item>
                    <text:p text:style-name="P20">Configurar nombre del switch</text:p>
                  </text:list-item>
                  <text:list-item>
                    <text:p text:style-name="P20">Configurar un aviso (banner motd) con el texto "El alumno [nombre del alumno] <text:soft-page-break/>está accediendo al SWITCH".</text:p>
                  </text:list-item>
                  <text:list-item>
                    <text:p text:style-name="P20">Configurar la vlan de administración (99) con la dirección IP indicada.</text:p>
                  </text:list-item>
                  <text:list-item>
                    <text:p text:style-name="P20">Configurar acceso desde consola y puertos VTY con la contraseña "foc012345"</text:p>
                  </text:list-item>
                  <text:list-item>
                    <text:p text:style-name="P20">Configurar contraseñas para modo enable</text:p>
                  </text:list-item>
                  <text:list-item>
                    <text:p text:style-name="P21">Configurar encriptado de esas contraseñas para que no se muestren en claro si se consulta la configuración del switch.</text:p>
                  </text:list-item>
                </text:list>
                <text:p text:style-name="P8"/>
                <text:p text:style-name="P22"><text:span text:style-name="Strong_20_Emphasis"><text:span text:style-name="T4">Paso 2: Configuración de acceso remoto seguro mediante SSH</text:span></text:span></text:p>
                <text:list text:style-name="L6">
                  <text:list-item>
                    <text:p text:style-name="P23">Nombre del dominio: "foc.es"</text:p>
                  </text:list-item>
                  <text:list-item>
                    <text:p text:style-name="P23">Longitud de llave de cifrado: 2048</text:p>
                  </text:list-item>
                  <text:list-item>
                    <text:p text:style-name="P23">Usuario SSH:</text:p>
                    <text:list>
                      <text:list-item>
                        <text:p text:style-name="P24">Nombre: nombre del alumno (por ejemplo: "juan")</text:p>
                      </text:list-item>
                      <text:list-item>
                        <text:p text:style-name="P24">Contraseña: DNI del alumno (por ejemplo: "12345678A").</text:p>
                      </text:list-item>
                    </text:list>
                  </text:list-item>
                  <text:list-item>
                    <text:p text:style-name="P23">Obligar a que el único método de acceso remoto sea ssh (transport input).</text:p>
                  </text:list-item>
                  <text:list-item>
                    <text:p text:style-name="P23">Usar la versión 2 de ssh.</text:p>
                  </text:list-item>
                  <text:list-item>
                    <text:p text:style-name="P23">Después de la configuración se debe poder acceder por ssh desde cualquier PC a ambos switches.</text:p>
                  </text:list-item>
                  <text:list-item>
                    <text:p text:style-name="P25">Verificar conexión SSH y comprobar que no se podrá acceder por TELNET.</text:p>
                  </text:list-item>
                </text:list>
                <text:list text:style-name="L7">
                  <text:list-item>
                    <text:p text:style-name="P26">Guardar los cambios de la configuración realizada en el fichero de inicio.</text:p>
                  </text:list-item>
                </text:list>
                <text:p text:style-name="P8"/>
                <text:p text:style-name="P9"><text:span text:style-name="Strong_20_Emphasis"><text:span text:style-name="T4">RA03_e) Se ha administrado la tabla de direcciones MAC del conmutador.</text:span></text:span></text:p>
                <text:list text:style-name="L8">
                  <text:list-item>
                    <text:p text:style-name="P27">Hacer varios PINGs entre los equipos y mostrar las direcciones MAC aprendidas en el SWITCH.</text:p>
                  </text:list-item>
                </text:list>
                <text:p text:style-name="P8"/>
                <text:p text:style-name="P9"><text:span text:style-name="Strong_20_Emphasis"><text:span text:style-name="T4">RA03_f) Se ha configurado la seguridad del puerto.</text:span></text:span></text:p>
                <text:list text:style-name="L9">
                  <text:list-item>
                    <text:p text:style-name="P28">¿Qué modo de restricción deshabilita un puerto cuando se han superado el numero máximo de direcciones MACs conectadas?</text:p>
                  </text:list-item>
                </text:list>
                <text:p text:style-name="P9"><text:span text:style-name="Strong_20_Emphasis"><text:span text:style-name="T4"><text:line-break/>RA03_g) Se ha actualizado el sistema operativo del conmutador.</text:span></text:span></text:p>
                <text:list text:style-name="L10">
                  <text:list-item>
                    <text:p text:style-name="P29">Muestre la configuración actual del switch.</text:p>
                  </text:list-item>
                </text:list>
                <text:p text:style-name="P9"><text:span text:style-name="Strong_20_Emphasis"><text:span text:style-name="T6"> </text:span></text:span><text:span text:style-name="T3"/></text:p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seguir los siguientes pasos:</text:p>
                <text:list text:style-name="L11">
                  <text:list-item>
                    <text:p text:style-name="P30">Repasar el videoconcepto "Formas de conexión al switch".</text:p>
                  </text:list-item>
                  <text:list-item>
                    <text:p text:style-name="P30">Repasar el videoconcepto "Acceso seguro"</text:p>
                  </text:list-item>
                  <text:list-item>
                    <text:p text:style-name="P30">Repasar el ejercicio resuelto "Configuración inicial de un switch".</text:p>
                  </text:list-item>
                  <text:list-item>
                    <text:p text:style-name="P30"><text:soft-page-break/>Una vez visualizada la sesión online 1 de la unidad, puede iniciar la tarea.</text:p>
                  </text:list-item>
                  <text:list-item>
                    <text:p text:style-name="P31">Una vez visualizada la sesión online 2 de la unidad, puede implementar el acceso remoto.</text:p>
                  </text:list-item>
                </text:list>
                <text:p text:style-name="P4"> </text:p>
                <text:p text:style-name="P3">Ante cualquier duda, consulte con su docente<text:span text:style-name="T7">.</text:span>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07:53.713504600</meta:creation-date>
    <dc:date>2026-06-15T06:08:00.639085500</dc:date>
    <meta:editing-duration>PT7S</meta:editing-duration>
    <meta:editing-cycles>1</meta:editing-cycles>
    <meta:document-statistic meta:table-count="3" meta:image-count="0" meta:object-count="0" meta:page-count="3" meta:paragraph-count="65" meta:word-count="624" meta:character-count="3734" meta:non-whitespace-character-count="3203"/>
    <meta:generator>LibreOffice/26.2.3.2$Windows_X86_64 LibreOffice_project/70e089b17412e4cb7773e41413306b17a2328c34</meta:generator>
  </office:meta>
</office:document-meta>
</file>