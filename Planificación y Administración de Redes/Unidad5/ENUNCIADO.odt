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B0E4B51216.jpg" manifest:media-type="image/jpeg"/>
  <manifest:file-entry manifest:full-path="Pictures/10000000000001EF0000008E848ABF0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2.A3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 style:list-style-name="L2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2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3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7" style:family="paragraph" style:parent-style-name="Table_20_Contents" style:list-style-name="L4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8" style:family="paragraph" style:parent-style-name="Table_20_Contents" style:list-style-name="L4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9" style:family="paragraph" style:parent-style-name="Table_20_Contents" style:list-style-name="L5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0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2" style:family="paragraph" style:parent-style-name="Table_20_Contents" style:list-style-name="L6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3" style:family="paragraph" style:parent-style-name="Table_20_Contents" style:list-style-name="L6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font-size="12pt"/>
    </style:style>
    <style:style style:name="T6" style:family="text">
      <style:text-properties fo:color="#555555" loext:opacity="100%" style:font-name="HelveticaNeue-Light" fo:font-size="12pt" style:font-name-asian="HelveticaNeue-Light" style:font-name-complex="HelveticaNeue-Ligh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Se requieren enlaces troncales para transmitir información de VLAN entre switches. Un puerto de un switch es un puerto de acceso o un puerto de enlace troncal. Los puertos de acceso transportan el tráfico de una VLAN específica asignada al puerto. Un puerto de enlace troncal pertenece a todas las VLAN de manera predeterminada; por lo tanto, transporta el tráfico para todas las VLAN. Esta actividad se centra en la creación de puertos de enlace troncal y en la asignación a una VLAN nativa distinta a la predeterminada.</text:p>
                <text:p text:style-name="P4"> </text:p>
                <text:p text:style-name="P3">Para realizar esta tarea es aconsejable revisar los contenidos de la Unidad 5.</text:p>
                <text:p text:style-name="P3">.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7"><text:span text:style-name="Strong_20_Emphasis"><text:span text:style-name="T4">Escenario de partida:</text:span></text:span></text:p>
                <text:p text:style-name="P8"/>
                <text:p text:style-name="P3">El alumno deberá crear en Packet Tracer la siguiente topología:</text:p>
                <text:p text:style-name="P4"><draw:frame draw:style-name="fr1" draw:name="Imagen1" text:anchor-type="as-char" svg:width="13.097cm" svg:height="7.832cm" draw:z-index="0"><draw:image xlink:href="Pictures/10000000000002D2000001B0E4B51216.jpg" xlink:type="simple" xlink:show="embed" xlink:actuate="onLoad" draw:mime-type="image/jpeg"/><svg:title>Configuracion VLANs</svg:title></draw:frame></text:p>
                <text:p text:style-name="P4"><draw:frame draw:style-name="fr1" draw:name="Imagen2" text:anchor-type="as-char" svg:width="13.097cm" svg:height="3.757cm" draw:z-index="1"><draw:image xlink:href="Pictures/10000000000001EF0000008E848ABF07.jpg" xlink:type="simple" xlink:show="embed" xlink:actuate="onLoad" draw:mime-type="image/jpeg"/><svg:title>Tabla direccionamiento</svg:title></draw:frame></text:p>
                <text:p text:style-name="P8"/>
                <text:p text:style-name="P3">El alumno debe sustituir el nombre del dispositivo S1, S2 y S3 por [nombre_alumno]1, [nombre_alumno]2 y [nombre_alumno]3. </text:p>
                <text:list text:style-name="L1">
                  <text:list-item>
                    <text:p text:style-name="P9"><text:soft-page-break/>Ejemplo: "Juan1", "Juan2" y "Juan3"</text:p>
                  </text:list-item>
                </text:list>
                <text:p text:style-name="P8"/>
                <text:p text:style-name="P7"><text:span text:style-name="Strong_20_Emphasis"><text:span text:style-name="T4">RA05_b: Se han implementado VLANs:</text:span></text:span></text:p>
                <text:list text:style-name="L2">
                  <text:list-item>
                    <text:p text:style-name="P10">Deberá crear las VLANs 10,20 y 30</text:p>
                  </text:list-item>
                  <text:list-item>
                    <text:p text:style-name="P10">Deberá proporcionar un nombre a cada VLAN</text:p>
                    <text:list>
                      <text:list-item>
                        <text:p text:style-name="P11">VLAN 10: lan1</text:p>
                      </text:list-item>
                      <text:list-item>
                        <text:p text:style-name="P11">VLAN 20: lan2</text:p>
                      </text:list-item>
                      <text:list-item>
                        <text:p text:style-name="P11">VLAN 30: lan3</text:p>
                      </text:list-item>
                    </text:list>
                  </text:list-item>
                  <text:list-item>
                    <text:p text:style-name="P10">Deberá crear una VLAN adicional (VLAN 99) para administración y configurarla como VLAN nativa de cada switch.</text:p>
                  </text:list-item>
                  <text:list-item>
                    <text:p text:style-name="P10">Deberá configurar los enlaces de los switchs de acceso.</text:p>
                  </text:list-item>
                  <text:list-item>
                    <text:p text:style-name="P12">Muestre las VLANs y los puertos asignados a ellas.</text:p>
                  </text:list-item>
                </text:list>
                <text:p text:style-name="P7"><text:span text:style-name="Strong_20_Emphasis"><text:span text:style-name="T4">RA05_d: Se han configurado enlaces troncales:</text:span></text:span></text:p>
                <text:list text:style-name="L3">
                  <text:list-item>
                    <text:p text:style-name="P13">Deberá configurar los enlaces troncales para implementar las VLANs de la topología:</text:p>
                    <text:list>
                      <text:list-item>
                        <text:p text:style-name="P14">El Switch S2 conecta con g0/1 con la interfaz g0/1 de S1</text:p>
                      </text:list-item>
                      <text:list-item>
                        <text:p text:style-name="P14">El Switch S3 conecta con g0/1 con la interfaz g0/2 de S1</text:p>
                      </text:list-item>
                    </text:list>
                  </text:list-item>
                  <text:list-item>
                    <text:p text:style-name="P13">Los puertos troncales deben pasar su VLAN nativa a la VLAN 99</text:p>
                  </text:list-item>
                  <text:list-item>
                    <text:p text:style-name="P15">Los puertos troncales deben permitir las VLANs 10,20,30 y 99</text:p>
                  </text:list-item>
                </text:list>
                <text:p text:style-name="P7"><text:span text:style-name="Strong_20_Emphasis"><text:span text:style-name="T4">RA05_e: Se ha utilizado un router para interconectar diversas VLANs.</text:span></text:span></text:p>
                <text:list text:style-name="L4">
                  <text:list-item>
                    <text:p text:style-name="P16">Añada a la red un nuevo dispositivo: router o switch multicapa y conéctalo al switch que une los dos switches (S1 en la imagen).</text:p>
                  </text:list-item>
                  <text:list-item>
                    <text:p text:style-name="P16">Las IPs de este router en cada VLAN serán:</text:p>
                    <text:list>
                      <text:list-item>
                        <text:p text:style-name="P17">VLAN 10: 192.168.1.1/24</text:p>
                      </text:list-item>
                      <text:list-item>
                        <text:p text:style-name="P17">VLAN 20: 192.168.2.1/24</text:p>
                      </text:list-item>
                      <text:list-item>
                        <text:p text:style-name="P17">VLAN 30: 192.168.3.1/24</text:p>
                      </text:list-item>
                    </text:list>
                  </text:list-item>
                  <text:list-item>
                    <text:p text:style-name="P16">Configure el enrutamiento entre el switch (S1) con este nuevo dispositivo, utilizando el método que estime más oportuno.</text:p>
                  </text:list-item>
                  <text:list-item>
                    <text:p text:style-name="P18">Muestre el resultado de hacer un PING entre un equipo de la VLAN 10 y otro de la VLAN 20.</text:p>
                  </text:list-item>
                </text:list>
                <text:p text:style-name="P7"><text:span text:style-name="Strong_20_Emphasis"><text:span text:style-name="T4">Pruebas de conexión y escenario planteado:</text:span></text:span></text:p>
                <text:list text:style-name="L5">
                  <text:list-item>
                    <text:p text:style-name="P19">Deberá mostrar la información de todas las VLAN en cada switch</text:p>
                  </text:list-item>
                  <text:list-item>
                    <text:p text:style-name="P19">Deberá mostrar la información de todas las VLAN permitidas en cada enlace troncal.</text:p>
                  </text:list-item>
                  <text:list-item>
                    <text:p text:style-name="P19">Deberá mostrar el correcto funcionamiento de la red realizando un PING de PC2 a PC5.</text:p>
                  </text:list-item>
                  <text:list-item>
                    <text:p text:style-name="P20">Deberá mostrar el correcto funcionamiento del enrutamiento realizando un PING de PC1 a PC5.<text:span text:style-name="T3"/></text:p>
                  </text:list-item>
                </text:list>
              </table:table-cell>
            </table:table-row>
            <table:table-row table:style-name="Tabla2.1">
              <table:table-cell table:style-name="Tabla2.A3" office:value-type="string">
                <text:p text:style-name="P21"/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ext:soft-page-break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1">
              <table:table-cell table:style-name="Tabla3.A2" office:value-type="string">
                <text:p text:style-name="P3">Para realizar esta tarea es aconsejable seguir los siguientes pasos:</text:p>
                <text:list text:style-name="L6">
                  <text:list-item>
                    <text:p text:style-name="P22">Repasar el videoconcepto "Configuración de una VLAN".</text:p>
                  </text:list-item>
                  <text:list-item>
                    <text:p text:style-name="P22">Repasar el videoconcepto "Configuración de enlaces troncales"</text:p>
                  </text:list-item>
                  <text:list-item>
                    <text:p text:style-name="P22">Repasar el videoconcepto "Enlaces troncales".</text:p>
                  </text:list-item>
                  <text:list-item>
                    <text:p text:style-name="P22">Repasar el ejercicio resuelto "Resolución de problemas de implementación de VLAN".</text:p>
                  </text:list-item>
                  <text:list-item>
                    <text:p text:style-name="P22">Una vez visualizada la sesión online sobre creación de VLANs, puede iniciar la tarea.</text:p>
                  </text:list-item>
                  <text:list-item>
                    <text:p text:style-name="P23">Una vez visualizada la sesión online sobre enlaces troncales, puede finalizar la tarea.</text:p>
                  </text:list-item>
                </text:list>
                <text:p text:style-name="P4"> </text:p>
                <text:p text:style-name="P3">Ante cualquier duda, consulte con su docente<text:span text:style-name="T5">.</text:span><text:span text:style-name="T6"/></text:p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09:43.485077800</meta:creation-date>
    <dc:date>2026-06-15T06:10:04.334834200</dc:date>
    <meta:editing-duration>PT21S</meta:editing-duration>
    <meta:editing-cycles>1</meta:editing-cycles>
    <meta:document-statistic meta:table-count="3" meta:image-count="2" meta:object-count="0" meta:page-count="3" meta:paragraph-count="53" meta:word-count="549" meta:character-count="3181" meta:non-whitespace-character-count="2709"/>
    <meta:generator>LibreOffice/26.2.3.2$Windows_X86_64 LibreOffice_project/70e089b17412e4cb7773e41413306b17a2328c34</meta:generator>
  </office:meta>
</office:document-meta>
</file>