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3000000C3161F9C10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41.434cm" table:align="left"/>
    </style:style>
    <style:style style:name="Tabla2.A" style:family="table-column">
      <style:table-column-properties style:column-width="41.434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2pt" style:font-size-asian="2pt" style:font-size-complex="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Heading_20_2">
      <style:paragraph-properties fo:margin-left="0cm" fo:margin-right="0cm" fo:margin-top="0.037cm" fo:margin-bottom="0cm" style:contextual-spacing="false" style:line-height-at-least="0.596cm" fo:text-align="justify" style:justify-single-word="false" fo:text-indent="0cm" style:auto-text-indent="false"/>
      <style:text-properties fo:color="#555555" loext:opacity="100%" style:font-name="Arial2" fo:font-size="15pt" fo:font-weight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12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3" style:family="paragraph" style:parent-style-name="Table_20_Contents" style:list-style-name="L2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5" style:family="paragraph" style:parent-style-name="Table_20_Contents" style:list-style-name="L3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6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Table_20_Contents" style:list-style-name="L4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9" style:family="paragraph" style:parent-style-name="Table_20_Contents" style:list-style-name="L4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153152" loext:opacity="100%" style:font-name="HelveticaNeue-Light" fo:font-weight="bold"/>
    </style:style>
    <style:style style:name="T5" style:family="text">
      <style:text-properties fo:color="#153152" loext:opacity="100%" style:font-name="HelveticaNeue-Light" fo:font-weight="bold" style:font-name-asian="HelveticaNeue-Light" style:font-weight-asian="bold" style:font-name-complex="HelveticaNeue-Light" style:font-weight-complex="bold"/>
    </style:style>
    <style:style style:name="T6" style:family="text">
      <style:text-properties fo:color="#555555" loext:opacity="100%" style:font-name="HelveticaNeue-Ligh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Se va a configurar dos redes locales unidas con un router. En la tarea configureremos PAT en el router pata ver como se modifican las direcciones IP de privadas a públicas y viceversa.</text:p>
                <text:p text:style-name="P3">Para realizar esta tarea es aconsejable revisar los contenidos de la Unidad 7.<text:span text:style-name="T3"/></text:p>
              </table:table-cell>
            </table:table-row>
          </table:table>
          <text:p text:style-name="P4"/>
        </text:section>
      </text:section>
      <text:section text:style-name="Sect1" text:name="id25">
        <text:p text:style-name="P5"/>
        <text:section text:style-name="Sect1" text:name="ta25_1">
          <text:p text:style-name="P5"/>
          <text:section text:style-name="Sect1" text:name="Sección1">
            <text:p text:style-name="P6"><text:bookmark text:name="ta25_1"/></text:p>
            <text:p text:style-name="P7">¿Qué debes hacer?</text:p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2"><text:span text:style-name="Strong_20_Emphasis"><text:span text:style-name="T4">ENUNCIADO DE LA TAREA</text:span></text:span><text:span text:style-name="T5"/></text:p>
                </table:table-cell>
              </table:table-row>
              <table:table-row table:style-name="Tabla2.1">
                <table:table-cell table:style-name="Tabla2.A2" office:value-type="string">
                  <text:p text:style-name="P8"/>
                  <text:h text:style-name="P9" text:outline-level="2">Tarea: Crear una VLAN</text:h>
                  <text:p text:style-name="P8"/>
                  <text:p text:style-name="P10"><text:span text:style-name="Strong_20_Emphasis"><text:span text:style-name="T6">RA07_c) Se ha utilizado NAT para realizar la traducción dinámica de direcciones de red.</text:span></text:span></text:p>
                  <text:p text:style-name="P3">El alumno deberá crear en Packet Tracer la siguiente topología:</text:p>
                  <text:p text:style-name="P11"><draw:frame draw:style-name="fr1" draw:name="Imagen1" text:anchor-type="as-char" svg:width="27.173cm" svg:height="5.159cm" draw:z-index="0"><draw:image xlink:href="Pictures/1000000000000403000000C3161F9C10.jpg" xlink:type="simple" xlink:show="embed" xlink:actuate="onLoad" draw:mime-type="image/jpeg"/><svg:title>escenario_PAT</svg:title></draw:frame></text:p>
                  <text:p text:style-name="P3">El alumno debe sustituir el nombre_alumno y apellido1_alumno del nombre de los equipos por su nombre y su primer apellido. </text:p>
                  <text:list text:style-name="L1">
                    <text:list-item>
                      <text:p text:style-name="P12">Ejemplo: Equipo ="Juan", Servidor="Mendoza".</text:p>
                    </text:list-item>
                  </text:list>
                  <text:p text:style-name="P3">Por lo tanto, el alumno:</text:p>
                  <text:list text:style-name="L2">
                    <text:list-item>
                      <text:p text:style-name="P13">Deberá crear las redes locales que se ven en la figura</text:p>
                    </text:list-item>
                    <text:list-item>
                      <text:p text:style-name="P13">Deberá configurar el protocolo PAT (NAT sobrecargado) en el router PAT, donde la interfaz que se sobrecargará será g0/1.</text:p>
                    </text:list-item>
                    <text:list-item>
                      <text:p text:style-name="P13">Deberá mostrar la configuración del router (show run).</text:p>
                    </text:list-item>
                    <text:list-item>
                      <text:p text:style-name="P14">Deberá mostrar el correcto funcionamiento de PAT mediante un PING entre el equipo y el servidor en modo simulación y mostrando la conversión de la dirección local (192.168.1.101) en la dirección "publica" de g0/1 (192.168.2.1) cuando el paquete llegue al router.</text:p>
                    </text:list-item>
                  </text:list>
                  <text:p text:style-name="P8"/>
                  <text:p text:style-name="P10"><text:span text:style-name="Strong_20_Emphasis"><text:span text:style-name="T6">RA07_e) Se han descrito las analogías y diferencias entre las tecnologías Wifi y Wimax.</text:span></text:span></text:p>
                  <text:list text:style-name="L3">
                    <text:list-item>
                      <text:p text:style-name="P15">¿Qué estándar IEEE describe la tecnología Wimax?</text:p>
                    </text:list-item>
                    <text:list-item>
                      <text:p text:style-name="P16">Explique con sus propias palabras que es la tecnología Wimax y un ejemplo de uso.<text:span text:style-name="T3"/></text:p>
                    </text:list-item>
                  </text:list>
                </table:table-cell>
              </table:table-row>
            </table:table>
            <text:p text:style-name="P4"/>
          </text:section>
        </text:section>
      </text:section>
      <text:section text:style-name="Sect1" text:name="id26">
        <text:p text:style-name="P17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ext:soft-page-break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seguir los siguientes pasos:</text:p>
                <text:list text:style-name="L4">
                  <text:list-item>
                    <text:p text:style-name="P18">Epígrafe "Configuración de PAT"</text:p>
                  </text:list-item>
                  <text:list-item>
                    <text:p text:style-name="P18">Repasar el videoconcepto "NAT dinámica".</text:p>
                  </text:list-item>
                  <text:list-item>
                    <text:p text:style-name="P18">Repasar el ejercicio resuelto: "Configuración de PAT".</text:p>
                  </text:list-item>
                  <text:list-item>
                    <text:p text:style-name="P19">Una vez visualizada la sesión online sobre la configuración de PAT puede iniciar la tarea. </text:p>
                  </text:list-item>
                </text:list>
                <text:p text:style-name="P3">Ante cualquier duda, consulte con su docente.<text:span text:style-name="T3"/></text:p>
              </table:table-cell>
            </table:table-row>
          </table:table>
          <text:p text:style-name="P4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11:39.073999500</meta:creation-date>
    <dc:date>2026-06-15T06:11:55.942626200</dc:date>
    <meta:editing-duration>PT17S</meta:editing-duration>
    <meta:editing-cycles>1</meta:editing-cycles>
    <meta:document-statistic meta:table-count="3" meta:image-count="1" meta:object-count="0" meta:page-count="2" meta:paragraph-count="28" meta:word-count="308" meta:character-count="1852" meta:non-whitespace-character-count="1580"/>
    <meta:generator>LibreOffice/26.2.3.2$Windows_X86_64 LibreOffice_project/70e089b17412e4cb7773e41413306b17a2328c34</meta:generator>
  </office:meta>
</office:document-meta>
</file>