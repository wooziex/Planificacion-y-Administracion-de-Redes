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fo:background-color="#fcfdfe">
        <style:background-image/>
      </style:table-row-properties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able_20_Contents" style:list-style-name="L1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0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1" style:family="paragraph" style:parent-style-name="Table_20_Contents" style:list-style-name="L2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2" style:family="paragraph" style:parent-style-name="Table_20_Contents" style:list-style-name="L3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3" style:family="paragraph" style:parent-style-name="Table_20_Contents" style:list-style-name="L3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14" style:family="paragraph" style:parent-style-name="Table_20_Contents" style:list-style-name="L3">
      <style:paragraph-properties fo:margin-left="0cm" fo:margin-right="0cm" fo:margin-top="0.265cm" fo:margin-bottom="0.499cm" style:contextual-spacing="false" fo:text-indent="0cm" style:auto-text-indent="false"/>
      <style:text-properties fo:color="#555555" loext:opacity="100%" style:font-name="HelveticaNeue-Light"/>
    </style:style>
    <style:style style:name="P15" style:family="paragraph" style:parent-style-name="Table_20_Contents" style:list-style-name="L4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6" style:family="paragraph" style:parent-style-name="Table_20_Contents" style:list-style-name="L4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17" style:family="paragraph" style:parent-style-name="Table_20_Contents" style:list-style-name="L4">
      <style:paragraph-properties fo:margin-left="0cm" fo:margin-right="0cm" fo:margin-top="0.265cm" fo:margin-bottom="0.499cm" style:contextual-spacing="false" fo:text-indent="0cm" style:auto-text-indent="false"/>
      <style:text-properties fo:color="#555555" loext:opacity="100%" style:font-name="HelveticaNeue-Light"/>
    </style:style>
    <style:style style:name="P18" style:family="paragraph" style:parent-style-name="Table_20_Contents" style:list-style-name="L5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555555" loext:opacity="100%" style:font-name="HelveticaNeue-Light"/>
    </style:style>
    <style:style style:name="T5" style:family="text">
      <style:text-properties fo:font-size="12pt"/>
    </style:style>
    <style:style style:name="T6" style:family="text">
      <style:text-properties fo:color="#555555" loext:opacity="100%" style:font-name="HelveticaNeue-Light" fo:font-size="12pt" style:font-name-asian="HelveticaNeue-Light" style:font-name-complex="HelveticaNeue-Ligh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Esta tarea va a tener dos partes, en la primera realizaremos un pequeño trabajo de investigación sobre redes inalámbricas. En la segunda realizaremos la configuración de una tarjeta de red.</text:p>
                <text:p text:style-name="P4"> </text:p>
                <text:p text:style-name="P3">Para realizar esta tarea es aconsejable revisar los contenidos de la Unidad 2.<text:span text:style-name="T3"/></text:p>
              </table:table-cell>
            </table:table-row>
          </table:table>
          <text:p text:style-name="P5"/>
        </text:section>
      </text:section>
      <text:section text:style-name="Sect1" text:name="id25">
        <text:p text:style-name="P6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2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p text:style-name="P3">En esta tarea vamos a realizar las siguientes tareas:</text:p>
                <text:p text:style-name="P7"/>
                <text:p text:style-name="P8"><text:span text:style-name="Strong_20_Emphasis"><text:span text:style-name="T4">RA02_b) Se han montado cables directos, cruzados y de consola.</text:span></text:span></text:p>
                <text:list text:style-name="L1">
                  <text:list-item>
                    <text:p text:style-name="P9">¿Con que tipo de cable conectarías un router con un router?</text:p>
                  </text:list-item>
                  <text:list-item>
                    <text:p text:style-name="P9">¿Con que tipo de cable conectarías un equipo con un switch?</text:p>
                  </text:list-item>
                  <text:list-item>
                    <text:p text:style-name="P10">¿Con que tipo de cable conectarías un equipo con un router para configurarlo por primera vez?</text:p>
                  </text:list-item>
                </text:list>
                <text:p text:style-name="P8"><text:span text:style-name="Strong_20_Emphasis"><text:span text:style-name="T4">RA02_c) Se han utilizado comprobadores para verificar la conectividad de distintos tipos de cables.</text:span></text:span></text:p>
                <text:list text:style-name="L2">
                  <text:list-item>
                    <text:p text:style-name="P11">Busque información e indique un modelo de testeador de redes indicando su precio.</text:p>
                  </text:list-item>
                </text:list>
                <text:p text:style-name="P8"><text:span text:style-name="Strong_20_Emphasis"><text:span text:style-name="T4">RA02_e) Se han configurado adaptadores de red cableados e inalámbricos bajo distintos sistemas operativos.</text:span></text:span></text:p>
                <text:list text:style-name="L3">
                  <text:list-item>
                    <text:p text:style-name="P12">Configurar en una maquina virtual con Linux una tarjeta de red mediante consola utilizando NETPLAN: </text:p>
                    <text:list>
                      <text:list-item>
                        <text:p text:style-name="P13">Dirección IP estática 192.168.1.11 (dentro de la red 192.168.1.0/24)</text:p>
                      </text:list-item>
                      <text:list-item>
                        <text:p text:style-name="P13">Puerta de enlace: 192.168.1.1</text:p>
                      </text:list-item>
                      <text:list-item>
                        <text:p text:style-name="P13">Servidores DNS: 9.9.9.9 y 8.8.8.8</text:p>
                      </text:list-item>
                      <text:list-item>
                        <text:p text:style-name="P14">Realizar tests de pruebas para comprobar que la configuración es correcta y que se mantiene tras reiniciar el equipo.</text:p>
                      </text:list-item>
                    </text:list>
                  </text:list-item>
                </text:list>
                <text:p text:style-name="P8"><text:span text:style-name="Strong_20_Emphasis"><text:span text:style-name="T4">RA02_g) Se ha comprobado la conectividad entre diversos dispositivos y adaptadores inalámbricos sobre distintas configuraciones.</text:span></text:span></text:p>
                <text:list text:style-name="L4">
                  <text:list-item>
                    <text:p text:style-name="P15">Vamos a realizar un pequeño trabajo sobre redes inalámbricas, donde el alumno desarrollará los siguientes puntos:</text:p>
                    <text:list>
                      <text:list-item>
                        <text:p text:style-name="P16">Protocolos de redes inalámbricas 802.11: Comenta los protocolos de la familia 802.11 comentando sus características y comparándolos</text:p>
                      </text:list-item>
                      <text:list-item>
                        <text:p text:style-name="P16">Comenta las medidas de seguridad que se deberían implementar en dichas redes.</text:p>
                      </text:list-item>
                      <text:list-item>
                        <text:p text:style-name="P17">Comente posibles amenazas de seguridad de dichas redes.</text:p>
                      </text:list-item>
                    </text:list>
                  </text:list-item>
                </text:list>
                <text:p text:style-name="P8"><text:soft-page-break/><text:span text:style-name="Strong_20_Emphasis"><text:span text:style-name="T4">RA02_h) Se han utilizado aplicaciones para representar el mapa físico y lógico de una red.</text:span></text:span></text:p>
                <text:list text:style-name="L5">
                  <text:list-item>
                    <text:p text:style-name="P18">Indique que dos mapas topológicos de red existen y en que se diferencian.<text:span text:style-name="T3"/></text:p>
                  </text:list-item>
                </text:list>
              </table:table-cell>
            </table:table-row>
          </table:table>
          <text:p text:style-name="P5"/>
        </text:section>
      </text:section>
      <text:section text:style-name="Sect1" text:name="id26">
        <text:p text:style-name="P6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 table:style-name="Tabla3.1">
              <table:table-cell table:style-name="Tabla3.A1" office:value-type="string">
                <text:p text:style-name="P2"><text:span text:style-name="Strong_20_Emphasis"><text:span text:style-name="T1">CONSEJOS Y RECOMENDACIONES PARA REALIZAR LA TAREA.</text:span></text:span><text:span text:style-name="T2"/></text:p>
              </table:table-cell>
            </table:table-row>
            <table:table-row table:style-name="Tabla3.1">
              <table:table-cell table:style-name="Tabla3.A2" office:value-type="string">
                <text:p text:style-name="P3">Para realizar esta tarea es aconsejable seguir los siguientes pasos:</text:p>
                <text:p text:style-name="P3">1. Repasar el videoconcepto "Configuración de red en Ubuntu con NETPLAN"</text:p>
                <text:p text:style-name="P3">2. Una vez visualizada la sesión online donde se realiza la configuración de una tarjeta de red en Linux, puede finalizar la tarea.</text:p>
                <text:p text:style-name="P3">3. Utilice una máquina virtual Ubuntu (Linux) para realizar pruebas de configuración.</text:p>
                <text:p text:style-name="P4"> </text:p>
                <text:p text:style-name="P3">Ante cualquier duda, consulte con su docente<text:span text:style-name="T5">.</text:span><text:span text:style-name="T6"/></text:p>
              </table:table-cell>
            </table:table-row>
          </table:table>
          <text:p text:style-name="P5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06:06:33.869477800</meta:creation-date>
    <dc:date>2026-06-15T06:06:43.839287800</dc:date>
    <meta:editing-duration>PT10S</meta:editing-duration>
    <meta:editing-cycles>1</meta:editing-cycles>
    <meta:document-statistic meta:table-count="3" meta:image-count="0" meta:object-count="0" meta:page-count="2" meta:paragraph-count="35" meta:word-count="397" meta:character-count="2492" meta:non-whitespace-character-count="2139"/>
    <meta:generator>LibreOffice/26.2.3.2$Windows_X86_64 LibreOffice_project/70e089b17412e4cb7773e41413306b17a2328c34</meta:generator>
  </office:meta>
</office:document-meta>
</file>