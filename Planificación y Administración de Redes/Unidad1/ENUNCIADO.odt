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1" style:family="table-row">
      <style:table-row-properties fo:background-color="#fcfdfe">
        <style:background-image/>
      </style:table-row-properties>
    </style:style>
    <style:style style:name="Tabla1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1.A2" style:family="table-cell">
      <style:table-cell-properties style:vertical-align="middle" fo:padding="0.049cm" fo:border="0.5pt solid #d4e0e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7cm"/>
    </style:style>
    <style:style style:name="Tabla2.1" style:family="table-row">
      <style:table-row-properties fo:background-color="#fcfdfe">
        <style:background-image/>
      </style:table-row-properties>
    </style:style>
    <style:style style:name="Tabla2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2.A2" style:family="table-cell">
      <style:table-cell-properties style:vertical-align="middle" fo:padding="0.049cm" fo:border="0.5pt solid #d4e0e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7cm"/>
    </style:style>
    <style:style style:name="Tabla3.1" style:family="table-row">
      <style:table-row-properties fo:background-color="#fcfdfe">
        <style:background-image/>
      </style:table-row-properties>
    </style:style>
    <style:style style:name="Tabla3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3.2" style:family="table-row">
      <style:table-row-properties fo:background-color="#c3dcf7">
        <style:background-image/>
      </style:table-row-properties>
    </style:style>
    <style:style style:name="Tabla3.A2" style:family="table-cell">
      <style:table-cell-properties style:vertical-align="middle" fo:padding="0.049cm" fo:border="0.5pt solid #d4e0ee"/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 style:font-name="HelveticaNeue-Light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style:font-name-asian="HelveticaNeue-Light" style:font-size-asian="12pt" style:font-style-asian="normal" style:font-weight-asian="normal" style:font-name-complex="HelveticaNeue-Light" style:font-size-complex="12pt" style:font-style-complex="normal" style:font-weight-complex="normal" loext:padding="0cm" loext:border="non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Table_20_Contents" style:list-style-name="L1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8" style:family="paragraph" style:parent-style-name="Table_20_Contents" style:list-style-name="L1">
      <style:paragraph-properties fo:margin-left="0cm" fo:margin-right="0cm" fo:margin-top="0.265cm" fo:margin-bottom="0cm" style:contextual-spacing="false" fo:text-indent="0cm" style:auto-text-indent="false"/>
      <style:text-properties fo:color="#555555" loext:opacity="100%" style:font-name="HelveticaNeue-Light"/>
    </style:style>
    <style:style style:name="P9" style:family="paragraph" style:parent-style-name="Table_20_Contents" style:list-style-name="L1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</style:style>
    <style:style style:name="P12" style:family="paragraph" style:parent-style-name="Table_20_Contents">
      <style:paragraph-properties fo:margin-top="0cm" fo:margin-bottom="0.499cm" style:contextual-spacing="false"/>
    </style:style>
    <style:style style:name="P13" style:family="paragraph" style:parent-style-name="Table_20_Contents" style:list-style-name="L2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4" style:family="paragraph" style:parent-style-name="Table_20_Contents" style:list-style-name="L2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5" style:family="paragraph" style:parent-style-name="Table_20_Contents" style:list-style-name="L3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6" style:family="paragraph" style:parent-style-name="Table_20_Contents" style:list-style-name="L3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T1" style:family="text">
      <style:text-properties fo:color="#153152" loext:opacity="100%" style:font-name="HelveticaNeue-Light" fo:font-size="18pt" fo:font-weight="bold"/>
    </style:style>
    <style:style style:name="T2" style:family="text">
      <style:text-properties fo:color="#153152" loext:opacity="100%" style:font-name="HelveticaNeue-Light" fo:font-size="18pt" fo:font-weight="bold" style:font-name-asian="HelveticaNeue-Light" style:font-weight-asian="bold" style:font-name-complex="HelveticaNeue-Light" style:font-weight-complex="bold"/>
    </style:style>
    <style:style style:name="T3" style:family="text">
      <style:text-properties fo:color="#555555" loext:opacity="100%" style:font-name="HelveticaNeue-Light" style:font-name-asian="HelveticaNeue-Light" style:font-name-complex="HelveticaNeue-Light"/>
    </style:style>
    <style:style style:name="T4" style:family="text">
      <style:text-properties fo:color="#555555" loext:opacity="100%" style:font-name="HelveticaNeue-Ligh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id24">
        <text:section text:style-name="Sect1" text:name="ta24_1">
          <text:p text:style-name="P1">Introducción de la tarea</text:p>
          <table:table table:name="Tabla1" table:style-name="Tabla1">
            <table:table-column table:style-name="Tabla1.A"/>
            <table:table-row table:style-name="Tabla1.1">
              <table:table-cell table:style-name="Tabla1.A1" office:value-type="string">
                <text:p text:style-name="P2"><text:span text:style-name="Strong_20_Emphasis"><text:span text:style-name="T1">CONTEXTO DE LA TAREA</text:span></text:span><text:span text:style-name="T2"/></text:p>
              </table:table-cell>
            </table:table-row>
            <table:table-row table:style-name="Tabla1.1">
              <table:table-cell table:style-name="Tabla1.A2" office:value-type="string">
                <text:p text:style-name="P3">Esta tarea va a tener dos partes, en la primera realizaremos un pequeño trabajo de investigación para dar solución a un escenario dado. En la segunda realizaremos la simulación de una pequeña red en Packet Tracer.</text:p>
                <text:p text:style-name="P4"> </text:p>
                <text:p text:style-name="P3">Para realizar esta tarea es aconsejable revisar los contenidos de la Unidad 1.<text:span text:style-name="T3"/></text:p>
              </table:table-cell>
            </table:table-row>
          </table:table>
          <text:p text:style-name="P5"/>
        </text:section>
      </text:section>
      <text:section text:style-name="Sect1" text:name="id25">
        <text:p text:style-name="P6"/>
        <text:section text:style-name="Sect1" text:name="ta25_1">
          <text:p text:style-name="P1">¿Qué debes hacer?</text:p>
          <table:table table:name="Tabla2" table:style-name="Tabla2">
            <table:table-column table:style-name="Tabla2.A"/>
            <table:table-row table:style-name="Tabla2.1">
              <table:table-cell table:style-name="Tabla2.A1" office:value-type="string">
                <text:p text:style-name="P2"><text:span text:style-name="Strong_20_Emphasis"><text:span text:style-name="T1">ENUNCIADO DE LA TAREA</text:span></text:span><text:span text:style-name="T2"/></text:p>
              </table:table-cell>
            </table:table-row>
            <table:table-row table:style-name="Tabla2.1">
              <table:table-cell table:style-name="Tabla2.A2" office:value-type="string">
                <text:p text:style-name="P3">Esta tarea consiste en realizar las siguientes tareas:</text:p>
                <text:p text:style-name="P3">Simular una pequeña red en packet tracer con: </text:p>
                <text:list text:style-name="L1">
                  <text:list-item>
                    <text:p text:style-name="P7">Elementos:</text:p>
                    <text:list>
                      <text:list-item>
                        <text:p text:style-name="P8">Un router (modelo 1941)</text:p>
                      </text:list-item>
                      <text:list-item>
                        <text:p text:style-name="P8">Tres switches (modelo 2960)</text:p>
                      </text:list-item>
                      <text:list-item>
                        <text:p text:style-name="P8">Dos equipos de escritorio conectados con cable al switch1.</text:p>
                      </text:list-item>
                      <text:list-item>
                        <text:p text:style-name="P8">Un equipo y un servidor conectados con cable al switch2.</text:p>
                      </text:list-item>
                      <text:list-item>
                        <text:p text:style-name="P8">Dos de los switches (switch1 y switch2) irán conectados al tercer switch (swicth3) y esté al router.</text:p>
                      </text:list-item>
                    </text:list>
                  </text:list-item>
                  <text:list-item>
                    <text:p text:style-name="P7">El nombre de los equipos conectados será:</text:p>
                    <text:list>
                      <text:list-item>
                        <text:p text:style-name="P8">vuestro nombre+1,2,3, ... por ejemplo "juan1", "juan2", "juan3", ...</text:p>
                      </text:list-item>
                    </text:list>
                  </text:list-item>
                  <text:list-item>
                    <text:p text:style-name="P7">El nombre del servidor será:</text:p>
                    <text:list>
                      <text:list-item>
                        <text:p text:style-name="P8">vuestro apellido+1, por ejemplo "mendoza1"</text:p>
                      </text:list-item>
                    </text:list>
                  </text:list-item>
                  <text:list-item>
                    <text:p text:style-name="P7">El direccionamiento de la red será: 192.168.1.0/24</text:p>
                  </text:list-item>
                  <text:list-item>
                    <text:p text:style-name="P7">La conexión y el direccionamiento de red se configurará manualmente:</text:p>
                    <text:list>
                      <text:list-item>
                        <text:p text:style-name="P8">El router tendrá la dirección IP: 192.168.1.1 (mascara 255.255.255.0)</text:p>
                      </text:list-item>
                      <text:list-item>
                        <text:p text:style-name="P8">El servidor, que tendrá la dirección IP: 192.168.1.100 (mascara 255.255.255.0)</text:p>
                      </text:list-item>
                      <text:list-item>
                        <text:p text:style-name="P8">Los equipos tendrán una dirección en el rango 192.168.1.151 a 192.168.1.199 con mascara 255.255.255.0.</text:p>
                      </text:list-item>
                      <text:list-item>
                        <text:p text:style-name="P8">NOTA: Los switches no tienen IP</text:p>
                      </text:list-item>
                    </text:list>
                  </text:list-item>
                  <text:list-item>
                    <text:p text:style-name="P7">Habrá que mostrar la configuración IP de los equipos y dispositivos de red.</text:p>
                  </text:list-item>
                  <text:list-item>
                    <text:p text:style-name="P7">Realizar pruebas de conexión entre los dos equipos de la red. </text:p>
                  </text:list-item>
                  <text:list-item>
                    <text:p text:style-name="P9">En estas pruebas hay que realizar un PING tanto en modo real como en simulación para ver los resultados.</text:p>
                  </text:list-item>
                </text:list>
                <text:p text:style-name="P3">Además, el alumno tendrá que contestar y explicar las preguntas realizadas en los criterios de evaluación que se comentan al final de este texto.</text:p>
                <text:p text:style-name="P10"><text:span text:style-name="Strong_20_Emphasis"><text:span text:style-name="T4">Importante:</text:span></text:span></text:p>
                <text:p text:style-name="P10"><text:span text:style-name="T4">NOTA: El alumno </text:span><text:span text:style-name="Strong_20_Emphasis"><text:span text:style-name="T4">podrá elegir</text:span></text:span><text:span text:style-name="T4"> cualquier otra configuración de los equipos y los dispositivos de red siempre que se respeten los requisitos solicitados en la tarea.</text:span></text:p>
                <text:p text:style-name="P3">NOTA: Cualquier configuración realizada en Packet Tracer debe ser indicada en el PDF <text:soft-page-break/>adjunto, con capturas de pantalla y texto explicativo de las acciones realizadas.</text:p>
                <text:p text:style-name="P3">NOTA: Importante leer a continuación los criterios de evaluación para la redacción correcta de la tarea.</text:p>
                <text:p text:style-name="P11"/>
                <text:p text:style-name="P3">Las tareas según los criterios de evaluación prácticos son:</text:p>
                <text:p text:style-name="P12"/>
                <text:p text:style-name="P10"><text:span text:style-name="Strong_20_Emphasis"><text:span text:style-name="T4">(RA1_ b) Se han diferenciado los distintos medios de transmisión utilizados en las redes.</text:span></text:span></text:p>
                <text:list text:style-name="L2">
                  <text:list-item>
                    <text:p text:style-name="P13">Implementar la red indicada con anterioridad</text:p>
                  </text:list-item>
                  <text:list-item>
                    <text:p text:style-name="P13">Conectar con el tipo de cable adecuado cada equipo a los dispositivos de red, y los dispositivos de red entre sí.</text:p>
                  </text:list-item>
                  <text:list-item>
                    <text:p text:style-name="P14">Realizar un ping entre un equipo y otro equipo en modo de simulación y muestra las capas de red involucradas.</text:p>
                  </text:list-item>
                </text:list>
                <text:p text:style-name="P10"><text:span text:style-name="Strong_20_Emphasis"><text:span text:style-name="T4">(RA1_ h) Se han diferenciado los dispositivos de interconexión de redes atendiendo al nivel funcional en el que se encuadran.</text:span></text:span></text:p>
                <text:list text:style-name="L3">
                  <text:list-item>
                    <text:p text:style-name="P15">Mostrar el mapa topológico lógico de la red.</text:p>
                  </text:list-item>
                  <text:list-item>
                    <text:p text:style-name="P15">Mostrar el mapa topológico físico de la red.</text:p>
                  </text:list-item>
                  <text:list-item>
                    <text:p text:style-name="P16">Mostrar un cuadro con el direccionamiento IP de los elementos de red (equipos y dispositivos)<text:span text:style-name="T3"/></text:p>
                  </text:list-item>
                </text:list>
              </table:table-cell>
            </table:table-row>
          </table:table>
          <text:p text:style-name="P5"/>
        </text:section>
      </text:section>
      <text:section text:style-name="Sect1" text:name="id26">
        <text:p text:style-name="P6"/>
        <text:section text:style-name="Sect1" text:name="ta26_1">
          <text:p text:style-name="P1">¿Qué debes tener en cuenta para resolver la tarea?</text:p>
          <table:table table:name="Tabla3" table:style-name="Tabla3">
            <table:table-column table:style-name="Tabla3.A"/>
            <table:table-row table:style-name="Tabla3.1">
              <table:table-cell table:style-name="Tabla3.A1" office:value-type="string">
                <text:p text:style-name="P2"><text:span text:style-name="Strong_20_Emphasis"><text:span text:style-name="T1">CONSEJOS Y RECOMENDACIONES PARA REALIZAR LA TAREA.</text:span></text:span><text:span text:style-name="T2"/></text:p>
              </table:table-cell>
            </table:table-row>
            <table:table-row table:style-name="Tabla3.2">
              <table:table-cell table:style-name="Tabla3.A2" office:value-type="string">
                <text:p text:style-name="P3">Para realizar esta tarea es aconsejable seguir los siguientes pasos:</text:p>
                <text:p text:style-name="P3">1. Repasar el videoconcepto "Representación de redes"</text:p>
                <text:p text:style-name="P3">2. Repasar el ejercicio resuelto: "Representación de redes"</text:p>
                <text:p text:style-name="P3">3. Una vez visualizada las sesiones online sobre packet tracer, juegue a crear escenarios desde uno simple a uno mas complejo.</text:p>
                <text:p text:style-name="P3">4. Utilice los switches y routers que el docente utiliza en las sesiones online.</text:p>
                <text:p text:style-name="P4"> </text:p>
                <text:p text:style-name="P3">Ante cualquier duda, consulte con su docente.<text:span text:style-name="T3"/></text:p>
              </table:table-cell>
            </table:table-row>
          </table:table>
          <text:p text:style-name="P5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5T05:58:06.678883500</meta:creation-date>
    <dc:date>2026-06-15T05:58:18.018211600</dc:date>
    <meta:editing-duration>PT11S</meta:editing-duration>
    <meta:editing-cycles>1</meta:editing-cycles>
    <meta:document-statistic meta:table-count="3" meta:image-count="0" meta:object-count="0" meta:page-count="2" meta:paragraph-count="51" meta:word-count="571" meta:character-count="3431" meta:non-whitespace-character-count="2930"/>
    <meta:generator>LibreOffice/26.2.3.2$Windows_X86_64 LibreOffice_project/70e089b17412e4cb7773e41413306b17a2328c34</meta:generator>
  </office:meta>
</office:document-meta>
</file>