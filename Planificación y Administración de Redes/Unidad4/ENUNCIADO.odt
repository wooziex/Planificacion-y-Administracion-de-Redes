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2.A3"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Arial2" fo:font-size="12pt" fo:font-weight="bold"/>
    </style:style>
    <style:style style:name="P8" style:family="paragraph" style:parent-style-name="Table_20_Contents" style:list-style-name="L1">
      <style:paragraph-properties fo:margin-left="0cm" fo:margin-right="0cm" fo:text-indent="0cm" style:auto-text-indent="false"/>
      <style:text-properties fo:color="#555555" loext:opacity="100%" style:font-name="HelveticaNeue-Light" fo:font-size="12pt"/>
    </style:style>
    <style:style style:name="P9"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paragraph-properties fo:margin-left="0cm" fo:margin-right="0cm" fo:margin-top="0cm" fo:margin-bottom="0cm" style:contextual-spacing="false" fo:text-indent="0cm" style:auto-text-indent="false"/>
    </style:style>
    <style:style style:name="P12" style:family="paragraph" style:parent-style-name="Table_20_Contents" style:list-style-name="L2">
      <style:paragraph-properties fo:margin-left="0cm" fo:margin-right="0cm" fo:text-indent="0cm" style:auto-text-indent="false"/>
      <style:text-properties fo:color="#555555" loext:opacity="100%" style:font-name="HelveticaNeue-Light" fo:font-size="12pt"/>
    </style:style>
    <style:style style:name="P13" style:family="paragraph" style:parent-style-name="Table_20_Contents" style:list-style-name="L2">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14"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fo:font-size="12pt"/>
    </style:style>
    <style:style style:name="P15" style:family="paragraph" style:parent-style-name="Table_20_Contents" style:list-style-name="L3">
      <style:paragraph-properties fo:margin-left="0cm" fo:margin-right="0cm" fo:text-indent="0cm" style:auto-text-indent="false"/>
      <style:text-properties fo:color="#555555" loext:opacity="100%" style:font-name="HelveticaNeue-Light" fo:font-size="12pt"/>
    </style:style>
    <style:style style:name="P16" style:family="paragraph" style:parent-style-name="Table_20_Contents" style:list-style-name="L3">
      <style:paragraph-properties fo:margin-left="0cm" fo:margin-right="0cm" fo:margin-top="0.265cm" fo:margin-bottom="0cm" style:contextual-spacing="false" fo:text-indent="0cm" style:auto-text-indent="false"/>
      <style:text-properties fo:color="#555555" loext:opacity="100%" style:font-name="HelveticaNeue-Light" fo:font-size="12pt"/>
    </style:style>
    <style:style style:name="P17" style:family="paragraph" style:parent-style-name="Table_20_Contents" style:list-style-name="L3">
      <style:paragraph-properties fo:margin-left="0cm" fo:margin-right="0cm" fo:margin-top="0.265cm" fo:margin-bottom="0.499cm" style:contextual-spacing="false" fo:text-indent="0cm" style:auto-text-indent="false"/>
      <style:text-properties fo:color="#555555" loext:opacity="100%" style:font-name="HelveticaNeue-Light" fo:font-size="12pt"/>
    </style:style>
    <style:style style:name="P18" style:family="paragraph" style:parent-style-name="Table_20_Contents" style:list-style-name="L4">
      <style:paragraph-properties fo:margin-left="0cm" fo:margin-right="0cm" fo:text-indent="0cm" style:auto-text-indent="false"/>
      <style:text-properties fo:color="#555555" loext:opacity="100%" style:font-name="HelveticaNeue-Light" fo:font-size="12pt"/>
    </style:style>
    <style:style style:name="P19" style:family="paragraph" style:parent-style-name="Table_20_Contents" style:list-style-name="L4">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20"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style>
    <style:style style:name="P21" style:family="paragraph" style:parent-style-name="Table_20_Contents">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22" style:family="paragraph" style:parent-style-name="Table_20_Contents" style:list-style-name="L5">
      <style:paragraph-properties fo:margin-left="0cm" fo:margin-right="0cm" fo:text-indent="0cm" style:auto-text-indent="false"/>
      <style:text-properties fo:color="#555555" loext:opacity="100%" style:font-name="HelveticaNeue-Light" fo:font-size="12pt"/>
    </style:style>
    <style:style style:name="P23" style:family="paragraph" style:parent-style-name="Table_20_Contents" style:list-style-name="L5">
      <style:paragraph-properties fo:margin-left="0cm" fo:margin-right="0cm" fo:margin-top="0.265cm" fo:margin-bottom="0cm" style:contextual-spacing="false" fo:text-indent="0cm" style:auto-text-indent="false"/>
      <style:text-properties fo:color="#555555" loext:opacity="100%" style:font-name="HelveticaNeue-Light" fo:font-size="12pt"/>
    </style:style>
    <style:style style:name="P24" style:family="paragraph" style:parent-style-name="Table_20_Contents" style:list-style-name="L5">
      <style:paragraph-properties fo:margin-left="0cm" fo:margin-right="0cm" fo:margin-top="0.265cm" fo:margin-bottom="0.499cm" style:contextual-spacing="false" fo:text-indent="0cm" style:auto-text-indent="false"/>
      <style:text-properties fo:color="#555555" loext:opacity="100%" style:font-name="HelveticaNeue-Light" fo:font-size="12pt"/>
    </style:style>
    <style:style style:name="P25"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style>
    <style:style style:name="P26" style:family="paragraph" style:parent-style-name="Table_20_Contents" style:list-style-name="L6">
      <style:paragraph-properties fo:margin-left="0cm" fo:margin-right="0cm" fo:text-indent="0cm" style:auto-text-indent="false"/>
      <style:text-properties fo:color="#555555" loext:opacity="100%" style:font-name="HelveticaNeue-Light" fo:font-size="12pt"/>
    </style:style>
    <style:style style:name="P27" style:family="paragraph" style:parent-style-name="Table_20_Contents" style:list-style-name="L6">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28" style:family="paragraph" style:parent-style-name="Table_20_Contents" style:list-style-name="L7">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29" style:family="paragraph" style:parent-style-name="Table_20_Contents" style:list-style-name="L8">
      <style:paragraph-properties fo:margin-left="0cm" fo:margin-right="0cm" fo:margin-top="0cm" fo:margin-bottom="0cm" style:contextual-spacing="false" fo:text-indent="0cm" style:auto-text-indent="false"/>
      <style:text-properties fo:color="#555555" loext:opacity="100%" style:font-name="HelveticaNeue-Light" fo:font-size="12pt"/>
    </style:style>
    <style:style style:name="P30"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2" fo:font-size="12pt" fo:font-weight="bold"/>
    </style:style>
    <style:style style:name="P31" style:family="paragraph" style:parent-style-name="Table_20_Contents" style:list-style-name="L9">
      <style:paragraph-properties fo:margin-left="0cm" fo:margin-right="0cm" fo:text-indent="0cm" style:auto-text-indent="false"/>
      <style:text-properties fo:color="#555555" loext:opacity="100%" style:font-name="HelveticaNeue-Light" fo:font-size="12pt"/>
    </style:style>
    <style:style style:name="P32" style:family="paragraph" style:parent-style-name="Table_20_Contents" style:list-style-name="L9">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33" style:family="paragraph" style:parent-style-name="Table_20_Contents" style:list-style-name="L10">
      <style:paragraph-properties fo:margin-left="0cm" fo:margin-right="0cm" fo:text-indent="0cm" style:auto-text-indent="false"/>
    </style:style>
    <style:style style:name="P34" style:family="paragraph" style:parent-style-name="Table_20_Contents" style:list-style-name="L10">
      <style:paragraph-properties fo:margin-left="0cm" fo:margin-right="0cm" fo:text-indent="0cm" style:auto-text-indent="false"/>
      <style:text-properties fo:color="#555555" loext:opacity="100%" style:font-name="HelveticaNeue-Light" fo:font-size="12pt"/>
    </style:style>
    <style:style style:name="P35" style:family="paragraph" style:parent-style-name="Table_20_Contents" style:list-style-name="L10">
      <style:paragraph-properties fo:margin-left="0cm" fo:margin-right="0cm" fo:margin-top="0cm" fo:margin-bottom="0.499cm" style:contextual-spacing="false" fo:text-indent="0cm" style:auto-text-indent="false"/>
    </style:style>
    <style:style style:name="P36" style:family="paragraph" style:parent-style-name="Table_20_Contents">
      <style:paragraph-properties fo:margin-left="0cm" fo:margin-right="0cm" fo:text-indent="0cm" style:auto-text-indent="false"/>
      <style:text-properties fo:font-size="2pt" style:font-size-asian="2pt" style:font-size-complex="2pt"/>
    </style:style>
    <style:style style:name="P37" style:family="paragraph" style:parent-style-name="Table_20_Contents" style:list-style-name="L11">
      <style:paragraph-properties fo:margin-left="0cm" fo:margin-right="0cm" fo:text-indent="0cm" style:auto-text-indent="false"/>
      <style:text-properties fo:color="#555555" loext:opacity="100%" style:font-name="HelveticaNeue-Light"/>
    </style:style>
    <style:style style:name="P38" style:family="paragraph" style:parent-style-name="Table_20_Contents" style:list-style-name="L11">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font-size="12pt"/>
    </style:style>
    <style:style style:name="T5" style:family="text">
      <style:text-properties fo:color="#555555" loext:opacity="100%" style:font-name="HelveticaNeue-Light" fo:font-size="12pt"/>
    </style:style>
    <style:style style:name="T6" style:family="text">
      <style:text-properties fo:color="#555555" loext:opacity="100%" style:font-name="HelveticaNeue-Light" fo:font-size="12pt" fo:font-weight="bold"/>
    </style:style>
    <style:style style:name="T7" style:family="text">
      <style:text-properties fo:color="#555555" loext:opacity="100%" style:font-name="HelveticaNeue-Light" fo:font-size="12pt" style:font-name-asian="HelveticaNeue-Light" style:font-name-complex="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La empresa en la que trabajamos ha abierto tres sucursales. Dado que recientemente se han dado problemas de red entre las sucursales se ha decidido implantar una red propia privada. Nuestro cometido será realizar una simulación de la estructura de la red empresarial para que sea evaluada por los responsables técnicos de la empresa que serán los encargados de tomar decisiones al respecto.</text:p>
                <text:p text:style-name="P4"> </text:p>
                <text:p text:style-name="P3">Para realizar esta tarea es aconsejable revisar los contenidos de la Unidad 4.</text:p>
                <text:p text:style-name="P3">.<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7">Escenario a montar:</text:p>
                <text:list text:style-name="L1">
                  <text:list-item>
                    <text:p text:style-name="P8">Vamos a tener tres routers denominados como el nombre del alumno, por ejemplo: Juan1, Juan2 y Juan3.</text:p>
                  </text:list-item>
                  <text:list-item>
                    <text:p text:style-name="P8">El modelo de router será de tipo CISCO 1941.</text:p>
                  </text:list-item>
                  <text:list-item>
                    <text:p text:style-name="P8">Los tres routers irán conectados entre sí con enlaces serial. Si hay que añadir una tarjeta adicional de conexión serial, podéis utilizar enlaces de tipo HWIC-2T en cada router.</text:p>
                  </text:list-item>
                  <text:list-item>
                    <text:p text:style-name="P8">En cada router conectaremos un switch denominado como el primer apellido del alumno, por ejemplo: Mendoza1, Mendoza2, Mendoza3.</text:p>
                  </text:list-item>
                  <text:list-item>
                    <text:p text:style-name="P8">De cada switch conectaremos un equipo, denominado como el segundo apellido del alumno, por ejemplo: Perez1, Perez2, Perez3.</text:p>
                  </text:list-item>
                  <text:list-item>
                    <text:p text:style-name="P9">Deberemos adjuntar en el PDF de la tarea un mapa topológico lógico de la red planteada.</text:p>
                  </text:list-item>
                </text:list>
                <text:p text:style-name="P3"><text:line-break/><text:span text:style-name="T4">Tareas:</text:span></text:p>
                <text:p text:style-name="P10"/>
                <text:p text:style-name="P11"><text:span text:style-name="Strong_20_Emphasis"><text:span text:style-name="T5">RA04_b) Se han utilizado distintos métodos para acceder al modo de configuración del router.</text:span></text:span></text:p>
                <text:list text:style-name="L2">
                  <text:list-item>
                    <text:p text:style-name="P12">Conecta un equipo a cada router para realizar la confifuración inicial.</text:p>
                  </text:list-item>
                  <text:list-item>
                    <text:p text:style-name="P13">Muestra en una captura el tipo de cable empleado y explica por que es así.</text:p>
                  </text:list-item>
                </text:list>
                <text:p text:style-name="P11"><text:span text:style-name="Strong_20_Emphasis"><text:span text:style-name="T5">RA04_d). Se han utilizado los comandos para la configuración y administración básica del router.</text:span></text:span></text:p>
                <text:p text:style-name="P10"/>
                <text:p text:style-name="P14">Configurar para cada router y equipo el direccionamiento IP, con las siguientes características:</text:p>
                <text:list text:style-name="L3">
                  <text:list-item>
                    <text:p text:style-name="P15">El direccionamiento entre routers será una red de dos hosts, es decir, una red de tipo /30 (Máscara en formato punteado: 255.255.255.252).</text:p>
                  </text:list-item>
                  <text:list-item>
                    <text:p text:style-name="P15">Cada router formará una red local con su equipo  y el switch con el direccionamiento:</text:p>
                    <text:list>
                      <text:list-item>
                        <text:p text:style-name="P16">192.168.1.0/24 para la red 1.</text:p>
                      </text:list-item>
                      <text:list-item>
                        <text:p text:style-name="P16"><text:soft-page-break/>192.168.2.0/24 para la red 2.</text:p>
                      </text:list-item>
                      <text:list-item>
                        <text:p text:style-name="P16">192.168.3.0/24 para la red 3.</text:p>
                      </text:list-item>
                    </text:list>
                  </text:list-item>
                  <text:list-item>
                    <text:p text:style-name="P15">La IP de cada router en su red local (con el switch y el PC) será una red /24, acabando la dirección del router en ".1" y la de los equipos en ".2"</text:p>
                    <text:list>
                      <text:list-item>
                        <text:p text:style-name="P16">Por ejemplo:</text:p>
                        <text:list>
                          <text:list-item>
                            <text:p text:style-name="P16">Routers: 192.168.1.1/24, 192.168.2.1/24 y 192.168.3.1/24.</text:p>
                          </text:list-item>
                          <text:list-item>
                            <text:p text:style-name="P17">Equipos: 192.168.1.2/24, 92.168.2.2/24 y 192.168.3.2/24.</text:p>
                          </text:list-item>
                        </text:list>
                      </text:list-item>
                    </text:list>
                  </text:list-item>
                </text:list>
                <text:p text:style-name="P14">Ejemplos de configuración</text:p>
                <text:list text:style-name="L4">
                  <text:list-item>
                    <text:p text:style-name="P18">Router "Juan1" (conexion al router " Juan2"): 10.0.0.1/30</text:p>
                  </text:list-item>
                  <text:list-item>
                    <text:p text:style-name="P18">Router "Juan1" (conexion al switch "Mendoza1"): 192.168.1.1/24</text:p>
                  </text:list-item>
                  <text:list-item>
                    <text:p text:style-name="P19">Equipo "Perez1": 192.168.1.2/24</text:p>
                  </text:list-item>
                </text:list>
                <text:p text:style-name="P14">Para los routers no es necesario incluir la puerta de enlace.</text:p>
                <text:p text:style-name="P14">Una vez acabado la configuración mostrar una tabla con la dirección IP de cada router y equipo de la red.</text:p>
                <text:h text:style-name="P20" text:outline-level="2"> </text:h>
                <text:p text:style-name="P21">Configuración de las routers</text:p>
                <text:list text:style-name="L5">
                  <text:list-item>
                    <text:p text:style-name="P22">Para cada router se han de configurar:</text:p>
                    <text:list>
                      <text:list-item>
                        <text:p text:style-name="P23">Configuración inicial:</text:p>
                        <text:list>
                          <text:list-item>
                            <text:p text:style-name="P23">Contraseña para el modo privilegiado: será "par012345"</text:p>
                          </text:list-item>
                          <text:list-item>
                            <text:p text:style-name="P23">Encriptado de contraseñas</text:p>
                          </text:list-item>
                          <text:list-item>
                            <text:p text:style-name="P23">Protección de consola y lineas vty: la contraseña será "par012345"</text:p>
                          </text:list-item>
                          <text:list-item>
                            <text:p text:style-name="P23">Mensaje de acceso (motd): "Hola, el acceso solo está autorizado para [nombre del alumno]"</text:p>
                          </text:list-item>
                          <text:list-item>
                            <text:p text:style-name="P23">Nombre del router: nombre del alumno, por ejemplo: Juan1, Juan2 y Juan3</text:p>
                          </text:list-item>
                        </text:list>
                      </text:list-item>
                      <text:list-item>
                        <text:p text:style-name="P24">Interfaces de red con el direccionamiento IP configurado en el paso anterior.</text:p>
                      </text:list-item>
                    </text:list>
                  </text:list-item>
                </text:list>
                <text:h text:style-name="P25" text:outline-level="2"><text:span text:style-name="Strong_20_Emphasis"><text:span text:style-name="T6">RA04_f). Se han configurado rutas estáticas.</text:span></text:span></text:h>
                <text:list text:style-name="L6">
                  <text:list-item>
                    <text:p text:style-name="P26">Para cada router se han de definir rutas estáticas de manera que sea posible hacer ping entre cualquier ordenador de las tres sucursales.</text:p>
                  </text:list-item>
                  <text:list-item>
                    <text:p text:style-name="P26">Muestre los resultados del PING.</text:p>
                  </text:list-item>
                  <text:list-item>
                    <text:p text:style-name="P27">No han de utilizarse rutas estáticas por defecto sino rutas individuales a las redes de destino.</text:p>
                  </text:list-item>
                </text:list>
                <text:p text:style-name="P7">RA04_g) Se han utilizado los comandos proporcionados por el sistema operativo del router que permiten hacer el seguimiento de posibles incidencias.</text:p>
                <text:list text:style-name="L7">
                  <text:list-item>
                    <text:p text:style-name="P28">Muestra la tabla de enrutamiento de cada router.</text:p>
                  </text:list-item>
                </text:list>
                <text:h text:style-name="P25" text:outline-level="2"/>
                <text:p text:style-name="P11"><text:span text:style-name="Strong_20_Emphasis"><text:span text:style-name="T5">RA04_h) Se ha configurado el router como servidor de direcciones IP dinámicas.</text:span></text:span></text:p>
                <text:list text:style-name="L8">
                  <text:list-item>
                    <text:p text:style-name="P29">¿Qué atributo de la configuración DHCP indica la puerta de enlace?</text:p>
                  </text:list-item>
                </text:list>
                <text:h text:style-name="P30" text:outline-level="2"><text:soft-page-break/>RA04_j) Se han utilizado comandos para gestionar listas de control de acceso.</text:h>
                <text:list text:style-name="L9">
                  <text:list-item>
                    <text:p text:style-name="P31">¿Qué máscara wildcard será equivalente a la máscara de subred 255.255.0.0?</text:p>
                  </text:list-item>
                  <text:list-item>
                    <text:p text:style-name="P32">¿Qué máscara wildcard será equivalente a la máscara de subred 255.255.255.252?</text:p>
                  </text:list-item>
                </text:list>
                <text:h text:style-name="P30" text:outline-level="2">Para validar la tarea:</text:h>
                <text:list text:style-name="L10">
                  <text:list-item>
                    <text:p text:style-name="P33"><text:span text:style-name="T5">Debe haber conectividad entre cualquier PC fijo: hay que realizar un </text:span><text:span text:style-name="Strong_20_Emphasis"><text:span text:style-name="T5">PING</text:span></text:span><text:span text:style-name="T5"> y mostrar los resultados.</text:span></text:p>
                  </text:list-item>
                  <text:list-item>
                    <text:p text:style-name="P33"><text:span text:style-name="T5">En la documentación debe aparecer una </text:span><text:span text:style-name="Strong_20_Emphasis"><text:span text:style-name="T5">captura de la instrucción show ip route </text:span></text:span><text:span text:style-name="T5">ejecutada en cada router.</text:span></text:p>
                  </text:list-item>
                  <text:list-item>
                    <text:p text:style-name="P34">Hay que mostrar el fichero de configuración de ejecución.</text:p>
                  </text:list-item>
                  <text:list-item>
                    <text:p text:style-name="P35"><text:span text:style-name="T5">Es obligatorio la inclusión de la</text:span><text:span text:style-name="Strong_20_Emphasis"><text:span text:style-name="T5"> tabla con los datos de red de todas las interfaces</text:span></text:span><text:span text:style-name="T5"> tanto de las de los routers como de los PCs.</text:span></text:p>
                  </text:list-item>
                </text:list>
              </table:table-cell>
            </table:table-row>
            <table:table-row table:style-name="Tabla2.1">
              <table:table-cell table:style-name="Tabla2.A3" office:value-type="string">
                <text:p text:style-name="P36"/>
              </table:table-cell>
            </table:table-row>
          </table:table>
          <text:p text:style-name="P5"/>
        </text:section>
      </text:section>
      <text:section text:style-name="Sect1" text:name="id26">
        <text:p text:style-name="P6"/>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es aconsejable seguir los siguientes pasos:</text:p>
                <text:list text:style-name="L11">
                  <text:list-item>
                    <text:p text:style-name="P37">Repasar el videoconcepto "Configuración de las interfaces de red".</text:p>
                  </text:list-item>
                  <text:list-item>
                    <text:p text:style-name="P37">Repasar el videoconcepto "Configuración de rutas estáticas"</text:p>
                  </text:list-item>
                  <text:list-item>
                    <text:p text:style-name="P37">Repasar el ejercicio resuelto "Configuración inicial de un router".</text:p>
                  </text:list-item>
                  <text:list-item>
                    <text:p text:style-name="P37">Repasar el ejercicio resuelto "Configuración de rutas estáticas y predeterminadas IPv4".</text:p>
                  </text:list-item>
                  <text:list-item>
                    <text:p text:style-name="P37">Una vez visualizada la sesión online sobre configuración inicial de un router, puede iniciar la tarea.</text:p>
                  </text:list-item>
                  <text:list-item>
                    <text:p text:style-name="P38">Una vez visualizada la sesión online sobre enrutamiento estático, puede implementar la configuración de rutas estáticas.</text:p>
                  </text:list-item>
                </text:list>
                <text:p text:style-name="P4"> </text:p>
                <text:p text:style-name="P3">Ante cualquier duda, consulte con su docente<text:span text:style-name="T4">.</text:span><text:span text:style-name="T7"/></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08:58.025513700</meta:creation-date>
    <dc:date>2026-06-15T06:09:06.483921500</dc:date>
    <meta:editing-duration>PT8S</meta:editing-duration>
    <meta:editing-cycles>1</meta:editing-cycles>
    <meta:document-statistic meta:table-count="3" meta:image-count="0" meta:object-count="0" meta:page-count="3" meta:paragraph-count="73" meta:word-count="844" meta:character-count="5108" meta:non-whitespace-character-count="4374"/>
    <meta:generator>LibreOffice/26.2.3.2$Windows_X86_64 LibreOffice_project/70e089b17412e4cb7773e41413306b17a2328c34</meta:generator>
  </office:meta>
</office:document-meta>
</file>